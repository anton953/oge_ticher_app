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000000191DE863C1652F7A3EF.png" manifest:media-type="image/png"/>
  <manifest:file-entry manifest:full-path="Pictures/100002010000058F000003071EC1767CF8300BF6.png" manifest:media-type="image/png"/>
  <manifest:file-entry manifest:full-path="Pictures/1000020100000500000002D0474EBA12329F25FE.png" manifest:media-type="image/png"/>
  <manifest:file-entry manifest:full-path="Pictures/100002010000022600000191B01971C976712023.png" manifest:media-type="image/png"/>
  <manifest:file-entry manifest:full-path="Pictures/100002010000022600000191FE93D2830FD5B699.png" manifest:media-type="image/png"/>
  <manifest:file-entry manifest:full-path="Pictures/100002010000001900000015CCF54905CA8C3B41.png" manifest:media-type="image/png"/>
  <manifest:file-entry manifest:full-path="Pictures/10000201000000160000001983331A9F0C0F5048.png" manifest:media-type="image/png"/>
  <manifest:file-entry manifest:full-path="Pictures/100002010000004C000000657A1215A872EE2ADF.png" manifest:media-type="image/png"/>
  <manifest:file-entry manifest:full-path="Pictures/100002010000001900000015E296DA6174334A15.png" manifest:media-type="image/png"/>
  <manifest:file-entry manifest:full-path="Pictures/100002010000000F00000015AC87648E78793110.png" manifest:media-type="image/png"/>
  <manifest:file-entry manifest:full-path="Pictures/1000020100000500000002D0902C77184B7842AF.png" manifest:media-type="image/png"/>
  <manifest:file-entry manifest:full-path="Pictures/100002010000001D0000001D83C85CA76C3F0A20.png" manifest:media-type="image/png"/>
  <manifest:file-entry manifest:full-path="Pictures/100002010000004100000042262A5D00F3C8D065.png" manifest:media-type="image/png"/>
  <manifest:file-entry manifest:full-path="Pictures/100002010000001C0000001DB2E78ED066DD18A0.png" manifest:media-type="image/png"/>
  <manifest:file-entry manifest:full-path="Pictures/100002010000003C0000003DF7D2342EAE43F1D0.png" manifest:media-type="image/png"/>
  <manifest:file-entry manifest:full-path="Pictures/100002010000003C0000003DAEF9C5618C18F87C.png" manifest:media-type="image/png"/>
  <manifest:file-entry manifest:full-path="Pictures/100002010000004100000042AB5992FF76D834A5.png" manifest:media-type="image/png"/>
  <manifest:file-entry manifest:full-path="Pictures/1000020100000488000001F567A080CCBE5C8971.png" manifest:media-type="image/png"/>
  <manifest:file-entry manifest:full-path="Pictures/10000201000001130000010F3422725C866E43B7.png" manifest:media-type="image/png"/>
  <manifest:file-entry manifest:full-path="Pictures/100002010000017200000192FAC46F2BD35CA2C7.png" manifest:media-type="image/png"/>
  <manifest:file-entry manifest:full-path="Pictures/100002010000001700000015B8917D5FD2D731F2.png" manifest:media-type="image/png"/>
  <manifest:file-entry manifest:full-path="Pictures/1000000000000500000003BDFFC65A0C2AEA6DC0.jpg" manifest:media-type="image/jpeg"/>
  <manifest:file-entry manifest:full-path="Pictures/TablePreview1.svm" manifest:media-type=""/>
  <manifest:file-entry manifest:full-path="Pictures/10000201000001130000010F74E6F5164F3B7614.png" manifest:media-type="image/png"/>
  <manifest:file-entry manifest:full-path="Pictures/100002010000001800000019E4F7867F0A818739.png" manifest:media-type="image/png"/>
  <manifest:file-entry manifest:full-path="Pictures/100002010000019000000191395B11A5C240CFB3.png" manifest:media-type="image/png"/>
  <manifest:file-entry manifest:full-path="Pictures/100002010000003C0000003D0DAEDE9C269490A7.png" manifest:media-type="image/png"/>
  <manifest:file-entry manifest:full-path="Pictures/10000201000001130000010FB1E16BECB33026C1.png" manifest:media-type="image/png"/>
  <manifest:file-entry manifest:full-path="Pictures/100002010000001600000019735EC6B686C33E68.png" manifest:media-type="image/png"/>
  <manifest:file-entry manifest:full-path="Pictures/1000020100000019000000155488C46EC5AA455B.png" manifest:media-type="image/png"/>
  <manifest:file-entry manifest:full-path="Pictures/100002010000000F0000001506BDA6A71F56A779.png" manifest:media-type="image/png"/>
  <manifest:file-entry manifest:full-path="Pictures/100002010000058F000003070BB95EF7C5B9E744.png" manifest:media-type="image/png"/>
  <manifest:file-entry manifest:full-path="Pictures/10000201000001720000019251A2D1B5287DE443.png" manifest:media-type="image/png"/>
  <manifest:file-entry manifest:full-path="Pictures/10000000000003BD00000500641004486C24D402.jpg" manifest:media-type="image/jpeg"/>
  <manifest:file-entry manifest:full-path="Pictures/100002010000059800000306EEFAD0613BB19A68.png" manifest:media-type="image/png"/>
  <manifest:file-entry manifest:full-path="Pictures/100002010000059D000002D7B698D2FC04FC1032.png" manifest:media-type="image/png"/>
  <manifest:file-entry manifest:full-path="Pictures/1000020100000028000000226BDDC76163B5FD42.png" manifest:media-type="image/png"/>
  <manifest:file-entry manifest:full-path="Pictures/10000000000003BD00000500DF3FAF9C8D532A16.jpg" manifest:media-type="image/jpeg"/>
  <manifest:file-entry manifest:full-path="Pictures/10000201000004880000017252AA76E4417E6188.png" manifest:media-type="image/png"/>
  <manifest:file-entry manifest:full-path="Pictures/1000020100000172000001922BA24DE5A441B409.png" manifest:media-type="image/png"/>
  <manifest:file-entry manifest:full-path="Pictures/10000201000002000000020027149763375CC54B.png" manifest:media-type="image/png"/>
  <manifest:file-entry manifest:full-path="Pictures/10000201000000410000004232CE0790D0A27C15.png" manifest:media-type="image/png"/>
  <manifest:file-entry manifest:full-path="Pictures/1000020100000018000000196784DA4486E86347.png" manifest:media-type="image/png"/>
  <manifest:file-entry manifest:full-path="Pictures/10000201000000190000001D92E7475DC0D58036.png" manifest:media-type="image/png"/>
  <manifest:file-entry manifest:full-path="Pictures/100002010000001C0000001D1DAB3AD6FF22C8C0.png" manifest:media-type="image/png"/>
  <manifest:file-entry manifest:full-path="Pictures/100002010000001D0000001DD1BBB788635682C4.png" manifest:media-type="image/png"/>
  <manifest:file-entry manifest:full-path="Pictures/1000020100000020000000224BB3F3ACE54ACDA3.png" manifest:media-type="image/png"/>
  <manifest:file-entry manifest:full-path="Pictures/100002010000058F00000307F6AA696C53BD7CE8.png" manifest:media-type="image/png"/>
  <manifest:file-entry manifest:full-path="Pictures/100002010000002800000022F32B1B534251F3AB.png" manifest:media-type="image/png"/>
  <manifest:file-entry manifest:full-path="Pictures/1000020100000028000000228EEA06F4F9CDDE8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rbanist Medium" svg:font-family="'Urbanist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deff9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33415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873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926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661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98cm, 0cm, 0.598cm)" draw:image-opacity="100%" style:mirror="none"/>
    </style:style>
    <style:style style:name="gr10" style:family="graphic" style:parent-style-name="standard">
      <style:graphic-properties draw:stroke="none" svg:stroke-width="0cm" draw:fill="solid" draw:fill-color="#d9ead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945cm" style:use-optimal-column-width="false"/>
    </style:style>
    <style:style style:name="co2" style:family="table-column">
      <style:table-column-properties style:column-width="5.885cm" style:use-optimal-column-width="false"/>
    </style:style>
    <style:style style:name="co3" style:family="table-column">
      <style:table-column-properties style:column-width="6.946cm" style:use-optimal-column-width="false"/>
    </style:style>
    <style:style style:name="co4" style:family="table-column">
      <style:table-column-properties style:column-width="8.915cm" style:use-optimal-column-width="false"/>
    </style:style>
    <style:style style:name="ro1" style:family="table-row">
      <style:table-row-properties style:row-height="1.74cm"/>
    </style:style>
    <style:style style:name="ro2" style:family="table-row">
      <style:table-row-properties style:row-height="1.744cm"/>
    </style:style>
    <style:style style:name="ce1" style:family="table-cell">
      <loext:graphic-properties draw:fill="solid" draw:fill-color="#1e293b" draw:textarea-vertical-align="middle" fo:padding-top="0.07cm" fo:padding-bottom="0.07cm" fo:padding-left="0.176cm" fo:padding-right="0.176cm"/>
      <style:paragraph-properties fo:border="0.37pt solid #000000"/>
    </style:style>
    <style:style style:name="ce2" style:family="table-cell">
      <loext:graphic-properties draw:fill="solid" draw:fill-color="#000000" draw:textarea-vertical-align="middle" fo:padding-top="0.07cm" fo:padding-bottom="0.07cm" fo:padding-left="0.176cm" fo:padding-right="0.176cm"/>
      <style:paragraph-properties fo:border="0.37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59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59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deff9a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334155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39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6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deff9a" style:text-line-through-style="none" style:text-line-through-type="none" style:text-position="0% 100%" style:font-name="Urbanist Medium" fo:font-size="62pt" fo:letter-spacing="normal" fo:font-style="normal" style:text-underline-style="none" fo:font-weight="normal" style:font-name-asian="Urbanist Medium" style:font-size-asian="62pt" style:font-style-asian="normal" style:font-weight-asian="normal" style:font-name-complex="Urbanist Medium" style:font-size-complex="62pt" style:font-style-complex="normal" style:font-weight-complex="normal"/>
    </style:style>
    <style:style style:name="T2" style:family="text">
      <style:text-properties fo:font-variant="normal" fo:text-transform="none" fo:color="#f5f5f5" style:text-line-through-style="none" style:text-line-through-type="none" style:text-position="0% 100%" style:font-name="Urbanist Medium" fo:font-size="62pt" fo:letter-spacing="normal" fo:font-style="normal" style:text-underline-style="none" fo:font-weight="normal" style:font-name-asian="Urbanist Medium" style:font-size-asian="62pt" style:font-style-asian="normal" style:font-weight-asian="normal" style:font-name-complex="Urbanist Medium" style:font-size-complex="62pt" style:font-style-complex="normal" style:font-weight-complex="normal"/>
    </style:style>
    <style:style style:name="T3" style:family="text">
      <style:text-properties fo:font-variant="normal" fo:text-transform="none" fo:color="#eeece1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cbd5e1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cbd5e1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6" style:family="text">
      <style:text-properties fo:font-variant="normal" fo:text-transform="none" fo:color="#cbd5e1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7" style:family="text">
      <style:text-properties fo:font-variant="normal" fo:text-transform="none" fo:color="#f5f5f5" style:text-line-through-style="none" style:text-line-through-type="none" style:text-position="0% 100%" style:font-name="Arial" fo:font-size="42.5pt" fo:letter-spacing="normal" fo:font-style="normal" style:text-underline-style="none" fo:font-weight="normal" style:font-name-asian="Arial" style:font-size-asian="42.5pt" style:font-style-asian="normal" style:font-weight-asian="normal" style:font-name-complex="Arial" style:font-size-complex="42.5pt" style:font-style-complex="normal" style:font-weight-complex="normal"/>
    </style:style>
    <style:style style:name="T8" style:family="text">
      <style:text-properties fo:font-variant="normal" fo:text-transform="none" fo:color="#deff9a" style:text-line-through-style="none" style:text-line-through-type="none" style:text-position="0% 100%" style:font-name="Arial" fo:font-size="42.5pt" fo:letter-spacing="normal" fo:font-style="normal" style:text-underline-style="none" fo:font-weight="normal" style:font-name-asian="Arial" style:font-size-asian="42.5pt" style:font-style-asian="normal" style:font-weight-asian="normal" style:font-name-complex="Arial" style:font-size-complex="42.5pt" style:font-style-complex="normal" style:font-weight-complex="normal"/>
    </style:style>
    <style:style style:name="T9" style:family="text">
      <style:text-properties fo:font-variant="normal" fo:text-transform="none" fo:color="#f5f5f5" style:text-line-through-style="none" style:text-line-through-type="none" style:text-position="0% 100%" style:font-name="Arial" fo:font-size="40.5pt" fo:letter-spacing="normal" fo:font-style="normal" style:text-underline-style="none" fo:font-weight="normal" style:font-name-asian="Arial" style:font-size-asian="40.5pt" style:font-style-asian="normal" style:font-weight-asian="normal" style:font-name-complex="Arial" style:font-size-complex="40.5pt" style:font-style-complex="normal" style:font-weight-complex="normal"/>
    </style:style>
    <style:style style:name="T10" style:family="text">
      <style:text-properties fo:font-variant="normal" fo:text-transform="none" fo:color="#deff9a" style:text-line-through-style="none" style:text-line-through-type="none" style:text-position="0% 100%" style:font-name="Arial" fo:font-size="40.5pt" fo:letter-spacing="normal" fo:font-style="normal" style:text-underline-style="none" fo:font-weight="normal" style:font-name-asian="Arial" style:font-size-asian="40.5pt" style:font-style-asian="normal" style:font-weight-asian="normal" style:font-name-complex="Arial" style:font-size-complex="40.5pt" style:font-style-complex="normal" style:font-weight-complex="normal"/>
    </style:style>
    <style:style style:name="T11" style:family="text">
      <style:text-properties fo:font-variant="normal" fo:text-transform="none" fo:color="#deff9a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f8faf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deff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deff9a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" style:family="text">
      <style:text-properties fo:font-variant="normal" fo:text-transform="none" fo:color="#f5f5f5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" style:family="text">
      <style:text-properties fo:font-variant="normal" fo:text-transform="none" fo:color="#cbd5e1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7" style:family="text">
      <style:text-properties fo:font-variant="normal" fo:text-transform="none" fo:color="#f5f5f5" style:text-line-through-style="none" style:text-line-through-type="none" style:text-position="0% 100%" style:font-name="Arial" fo:font-size="62pt" fo:letter-spacing="normal" fo:font-style="normal" style:text-underline-style="none" fo:font-weight="normal" style:font-name-asian="Arial" style:font-size-asian="62pt" style:font-style-asian="normal" style:font-weight-asian="normal" style:font-name-complex="Arial" style:font-size-complex="62pt" style:font-style-complex="normal" style:font-weight-complex="normal"/>
    </style:style>
    <style:style style:name="T18" style:family="text">
      <style:text-properties fo:font-variant="normal" fo:text-transform="none" fo:color="#deff9a" style:text-line-through-style="none" style:text-line-through-type="none" style:text-position="0% 100%" style:font-name="Arial" fo:font-size="62pt" fo:letter-spacing="normal" fo:font-style="normal" style:text-underline-style="none" fo:font-weight="normal" style:font-name-asian="Arial" style:font-size-asian="62pt" style:font-style-asian="normal" style:font-weight-asian="normal" style:font-name-complex="Arial" style:font-size-complex="62pt" style:font-style-complex="normal" style:font-weight-complex="normal"/>
    </style:style>
    <style:style style:name="T19" style:family="text">
      <style:text-properties fo:font-variant="normal" fo:text-transform="none" fo:color="#cbd5e1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1" style:family="text">
      <style:text-properties fo:font-variant="normal" fo:text-transform="none" fo:color="#f5f5f5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2" style:family="text">
      <style:text-properties fo:font-variant="normal" fo:text-transform="none" fo:color="#deff9a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3" style:family="text">
      <style:text-properties fo:font-variant="normal" fo:text-transform="none" fo:color="#deff9a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4" style:family="text">
      <style:text-properties fo:font-variant="normal" fo:text-transform="none" fo:color="#deff9a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25" style:family="text">
      <style:text-properties fo:font-variant="normal" fo:text-transform="none" fo:color="#cbd5e1" style:text-line-through-style="none" style:text-line-through-type="none" style:text-position="0% 100%" style:font-name="Arial" fo:font-size="15.5pt" fo:letter-spacing="normal" fo:font-style="normal" style:text-underline-style="none" fo:font-weight="normal" style:font-name-asian="Arial" style:font-size-asian="15.5pt" style:font-style-asian="normal" style:font-weight-asian="normal" style:font-name-complex="Arial" style:font-size-complex="15.5pt" style:font-style-complex="normal" style:font-weight-complex="normal"/>
    </style:style>
    <style:style style:name="T26" style:family="text">
      <style:text-properties fo:font-variant="normal" fo:text-transform="none" fo:color="#f5f5f5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7" style:family="text">
      <style:text-properties fo:font-variant="normal" fo:text-transform="none" fo:color="#f5f5f5" style:text-line-through-style="none" style:text-line-through-type="none" style:text-position="0% 100%" style:font-name="Arial" fo:font-size="44.5pt" fo:letter-spacing="normal" fo:font-style="normal" style:text-underline-style="none" fo:font-weight="normal" style:font-name-asian="Arial" style:font-size-asian="44.5pt" style:font-style-asian="normal" style:font-weight-asian="normal" style:font-name-complex="Arial" style:font-size-complex="44.5pt" style:font-style-complex="normal" style:font-weight-complex="normal"/>
    </style:style>
    <style:style style:name="T28" style:family="text">
      <style:text-properties fo:font-variant="normal" fo:text-transform="none" fo:color="#deff9a" style:text-line-through-style="none" style:text-line-through-type="none" style:text-position="0% 100%" style:font-name="Arial" fo:font-size="44.5pt" fo:letter-spacing="normal" fo:font-style="normal" style:text-underline-style="none" fo:font-weight="normal" style:font-name-asian="Arial" style:font-size-asian="44.5pt" style:font-style-asian="normal" style:font-weight-asian="normal" style:font-name-complex="Arial" style:font-size-complex="44.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30" style:family="text">
      <style:text-properties fo:font-variant="normal" fo:text-transform="none" fo:color="#deff9a" style:text-line-through-style="none" style:text-line-through-type="none" style:text-position="0% 100%" style:font-name="Arial" fo:font-size="46pt" fo:letter-spacing="normal" fo:font-style="normal" style:text-underline-style="none" fo:font-weight="normal" style:font-name-asian="Arial" style:font-size-asian="46pt" style:font-style-asian="normal" style:font-weight-asian="normal" style:font-name-complex="Arial" style:font-size-complex="46pt" style:font-style-complex="normal" style:font-weight-complex="normal"/>
    </style:style>
    <style:style style:name="T31" style:family="text">
      <style:text-properties fo:font-variant="normal" fo:text-transform="none" fo:color="#cbd5e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2" style:family="text">
      <style:text-properties fo:font-variant="normal" fo:text-transform="none" fo:color="#94a3b8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4" style:family="text">
      <style:text-properties fo:font-variant="normal" fo:text-transform="none" fo:color="#deff9a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84;p13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85;p13" draw:style-name="gr2" draw:text-style-name="P3" draw:layer="layout" svg:width="32.226cm" svg:height="2.625cm" svg:x="0.82cm" svg:y="6.629cm">
          <text:p text:style-name="P2"><text:span text:style-name="T1">OGE Teacher</text:span><text:span text:style-name="T2">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2" draw:text-style-name="P3" draw:layer="layout" svg:width="30.691cm" svg:height="1.479cm" svg:x="1.734cm" svg:y="9.687cm">
          <text:p text:style-name="P4"><text:span text:style-name="T3">Интерактивный тренажер для подготовки к ОГЭ по информатик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2" draw:text-style-name="P3" draw:layer="layout" svg:width="30.691cm" svg:height="2.542cm" svg:x="1.588cm" svg:y="11.409cm">
          <text:p text:style-name="P2"><text:span text:style-name="T4">Выполнил: Душенков Антон Александрович, 10В класс</text:span><text:span text:style-name="T4"><text:line-break/></text:span><text:span text:style-name="T4"> Руководитель: Келбусова С.С.</text:span><text:span text:style-name="T4"><text:line-break/></text:span><text:span text:style-name="T4"> ГБОУ Лицей № 554, СПб,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92;p14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93;p14" draw:style-name="gr2" draw:text-style-name="P3" draw:layer="layout" svg:width="22.489cm" svg:height="2.959cm" svg:x="2.91cm" svg:y="5.641cm">
          <text:p text:style-name="P6"><text:span text:style-name="T5">Цель:</text:span><text:span text:style-name="T6"> Разработать ПО на Python для автоматизации подготовки и повышения эффективности самоконтроля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2" draw:text-style-name="P3" draw:layer="layout" svg:width="22.489cm" svg:height="1.479cm" svg:x="2.91cm" svg:y="9.055cm">
          <text:p text:style-name="P6"><text:span text:style-name="T6">Проанализировать актуальные требования ФИПИ 2026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2" draw:text-style-name="P3" draw:layer="layout" svg:width="22.489cm" svg:height="2.959cm" svg:x="2.91cm" svg:y="10.964cm">
          <text:p text:style-name="P6"><text:span text:style-name="T6">Реализовать модули тестирования, учета времени и статисти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2" draw:text-style-name="P3" draw:layer="layout" svg:width="22.489cm" svg:height="1.479cm" svg:x="2.91cm" svg:y="14.377cm">
          <text:p text:style-name="P6"><text:span text:style-name="T6">Внедрить инструменты визуальной аналитики "слабых мест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4" draw:style-name="gr1" draw:text-style-name="P1" draw:layer="layout" svg:width="0.74cm" svg:height="0.766cm" svg:x="1.588cm" svg:y="5.89cm">
          <draw:image xlink:href="Pictures/100002010000001C0000001DB2E78ED066DD18A0.png" xlink:type="simple" xlink:show="embed" xlink:actuate="onLoad">
            <text:p/>
          </draw:image>
        </draw:frame>
        <draw:frame draw:name="Google Shape;98;p14" draw:style-name="gr1" draw:text-style-name="P1" draw:layer="layout" svg:width="0.74cm" svg:height="0.766cm" svg:x="1.588cm" svg:y="9.141cm">
          <draw:image xlink:href="Pictures/100002010000001C0000001D1DAB3AD6FF22C8C0.png" xlink:type="simple" xlink:show="embed" xlink:actuate="onLoad">
            <text:p/>
          </draw:image>
        </draw:frame>
        <draw:frame draw:name="Google Shape;99;p14" draw:style-name="gr1" draw:text-style-name="P1" draw:layer="layout" svg:width="0.74cm" svg:height="0.766cm" svg:x="1.588cm" svg:y="10.964cm">
          <draw:image xlink:href="Pictures/100002010000001C0000001D1DAB3AD6FF22C8C0.png" xlink:type="simple" xlink:show="embed" xlink:actuate="onLoad">
            <text:p/>
          </draw:image>
        </draw:frame>
        <draw:frame draw:name="Google Shape;100;p14" draw:style-name="gr1" draw:text-style-name="P1" draw:layer="layout" svg:width="0.74cm" svg:height="0.766cm" svg:x="1.588cm" svg:y="14.464cm">
          <draw:image xlink:href="Pictures/100002010000001C0000001D1DAB3AD6FF22C8C0.png" xlink:type="simple" xlink:show="embed" xlink:actuate="onLoad">
            <text:p/>
          </draw:image>
        </draw:frame>
        <draw:custom-shape draw:name="Google Shape;101;p14" draw:style-name="gr2" draw:text-style-name="P3" draw:layer="layout" svg:width="32.226cm" svg:height="1.976cm" svg:x="1.588cm" svg:y="1.588cm">
          <text:p text:style-name="P7"><text:span text:style-name="T7">Цели и задачи </text:span><text:span text:style-name="T8">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3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3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frame draw:name="Google Shape;106;p15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107;p15" draw:style-name="gr1" draw:text-style-name="P1" draw:layer="layout" svg:width="30.691cm" svg:height="13.244cm" svg:x="1.588cm" svg:y="4.217cm">
          <draw:image xlink:href="Pictures/1000020100000488000001F567A080CCBE5C8971.png" xlink:type="simple" xlink:show="embed" xlink:actuate="onLoad">
            <text:p/>
          </draw:image>
        </draw:frame>
        <draw:custom-shape draw:name="Google Shape;108;p15" draw:style-name="gr2" draw:text-style-name="P3" draw:layer="layout" svg:width="32.226cm" svg:height="1.884cm" svg:x="1.588cm" svg:y="1.588cm">
          <text:p text:style-name="P7"><text:span text:style-name="T9">Потребности </text:span><text:span text:style-name="T10">аудитор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3;p6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p6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frame draw:name="Google Shape;113;p16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114;p16" draw:style-name="standard" draw:layer="layout" svg:width="30.69cm" svg:height="8.703cm" svg:x="1.588cm" svg:y="6.75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11">Критерий</text:span></text:p>
              </table:table-cell>
              <table:table-cell>
                <text:p text:style-name="P8"><text:span text:style-name="T11">Решу ОГЭ</text:span></text:p>
              </table:table-cell>
              <table:table-cell>
                <text:p text:style-name="P8"><text:span text:style-name="T11">Банк ФИПИ</text:span></text:p>
              </table:table-cell>
              <table:table-cell>
                <text:p text:style-name="P8"><text:span text:style-name="T11">OGE Teacher App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Персональная аналитика</text:span></text:p>
              </table:table-cell>
              <table:table-cell>
                <text:p text:style-name="P8"><text:span text:style-name="T12">Поверхностная</text:span></text:p>
              </table:table-cell>
              <table:table-cell>
                <text:p text:style-name="P8"><text:span text:style-name="T12">Отсутствует</text:span></text:p>
              </table:table-cell>
              <table:table-cell>
                <text:p text:style-name="P8"><text:span text:style-name="T13">Глубокая (QtCharts)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Оффлайн-режим</text:span></text:p>
              </table:table-cell>
              <table:table-cell>
                <text:p text:style-name="P8"><text:span text:style-name="T12">Нет</text:span></text:p>
              </table:table-cell>
              <table:table-cell>
                <text:p text:style-name="P8"><text:span text:style-name="T12">Частично</text:span></text:p>
              </table:table-cell>
              <table:table-cell>
                <text:p text:style-name="P8"><text:span text:style-name="T13">Полная автономность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Учет времени (таймер)</text:span></text:p>
              </table:table-cell>
              <table:table-cell>
                <text:p text:style-name="P8"><text:span text:style-name="T12">Базовый</text:span></text:p>
              </table:table-cell>
              <table:table-cell>
                <text:p text:style-name="P8"><text:span text:style-name="T12">Нет</text:span></text:p>
              </table:table-cell>
              <table:table-cell>
                <text:p text:style-name="P8"><text:span text:style-name="T13">Индивидуальный трекинг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Интерфейс (UI/UX)</text:span></text:p>
              </table:table-cell>
              <table:table-cell>
                <text:p text:style-name="P8"><text:span text:style-name="T12">Устаревший</text:span></text:p>
              </table:table-cell>
              <table:table-cell>
                <text:p text:style-name="P8"><text:span text:style-name="T12">Минималистичный</text:span></text:p>
              </table:table-cell>
              <table:table-cell>
                <text:p text:style-name="P8"><text:span text:style-name="T13">Современный (PySide6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15;p16" draw:style-name="gr4" draw:text-style-name="P9" draw:layer="layout" svg:width="8.945cm" svg:height="0.052cm" svg:x="1.588cm" svg:y="8.4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6" draw:style-name="gr4" draw:text-style-name="P9" draw:layer="layout" svg:width="5.884cm" svg:height="0.052cm" svg:x="10.533cm" svg:y="8.4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6" draw:style-name="gr4" draw:text-style-name="P9" draw:layer="layout" svg:width="6.946cm" svg:height="0.052cm" svg:x="16.419cm" svg:y="8.4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6" draw:style-name="gr4" draw:text-style-name="P9" draw:layer="layout" svg:width="8.913cm" svg:height="0.052cm" svg:x="23.365cm" svg:y="8.4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6" draw:style-name="gr5" draw:text-style-name="P10" draw:layer="layout" svg:width="8.945cm" svg:height="0.026cm" svg:x="1.588cm" svg:y="10.25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6" draw:style-name="gr5" draw:text-style-name="P10" draw:layer="layout" svg:width="5.884cm" svg:height="0.026cm" svg:x="10.533cm" svg:y="10.25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6" draw:style-name="gr5" draw:text-style-name="P10" draw:layer="layout" svg:width="6.946cm" svg:height="0.026cm" svg:x="16.419cm" svg:y="10.25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6" draw:style-name="gr5" draw:text-style-name="P10" draw:layer="layout" svg:width="8.913cm" svg:height="0.026cm" svg:x="23.365cm" svg:y="10.25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5" draw:text-style-name="P10" draw:layer="layout" svg:width="8.945cm" svg:height="0.026cm" svg:x="1.588cm" svg:y="11.97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5" draw:text-style-name="P10" draw:layer="layout" svg:width="5.884cm" svg:height="0.026cm" svg:x="10.533cm" svg:y="11.97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6" draw:style-name="gr5" draw:text-style-name="P10" draw:layer="layout" svg:width="6.946cm" svg:height="0.026cm" svg:x="16.419cm" svg:y="11.97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5" draw:text-style-name="P10" draw:layer="layout" svg:width="8.913cm" svg:height="0.026cm" svg:x="23.365cm" svg:y="11.97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6" draw:style-name="gr5" draw:text-style-name="P10" draw:layer="layout" svg:width="8.945cm" svg:height="0.026cm" svg:x="1.588cm" svg:y="13.6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5" draw:text-style-name="P10" draw:layer="layout" svg:width="5.884cm" svg:height="0.026cm" svg:x="10.533cm" svg:y="13.6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6" draw:style-name="gr5" draw:text-style-name="P10" draw:layer="layout" svg:width="6.946cm" svg:height="0.026cm" svg:x="16.419cm" svg:y="13.6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6" draw:style-name="gr5" draw:text-style-name="P10" draw:layer="layout" svg:width="8.913cm" svg:height="0.026cm" svg:x="23.365cm" svg:y="13.6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6" draw:style-name="gr5" draw:text-style-name="P10" draw:layer="layout" svg:width="8.945cm" svg:height="0.026cm" svg:x="1.588cm" svg:y="15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6" draw:style-name="gr5" draw:text-style-name="P10" draw:layer="layout" svg:width="5.884cm" svg:height="0.026cm" svg:x="10.533cm" svg:y="15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6" draw:style-name="gr5" draw:text-style-name="P10" draw:layer="layout" svg:width="6.946cm" svg:height="0.026cm" svg:x="16.419cm" svg:y="15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6" draw:style-name="gr5" draw:text-style-name="P10" draw:layer="layout" svg:width="8.913cm" svg:height="0.026cm" svg:x="23.365cm" svg:y="15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6" draw:style-name="gr2" draw:text-style-name="P3" draw:layer="layout" svg:width="32.226cm" svg:height="1.884cm" svg:x="1.588cm" svg:y="1.588cm">
          <text:p text:style-name="P7"><text:span text:style-name="T9">Анализ </text:span><text:span text:style-name="T10">существующих</text:span><text:span text:style-name="T9"> решени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4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140;p17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141;p17" draw:style-name="gr1" draw:text-style-name="P1" draw:layer="layout" svg:width="7.275cm" svg:height="10.187cm" svg:x="1.588cm" svg:y="5.305cm">
          <draw:image xlink:href="Pictures/10000201000001130000010FB1E16BECB33026C1.png" xlink:type="simple" xlink:show="embed" xlink:actuate="onLoad">
            <text:p/>
          </draw:image>
        </draw:frame>
        <draw:frame draw:name="Google Shape;142;p17" draw:style-name="gr1" draw:text-style-name="P1" draw:layer="layout" svg:width="7.275cm" svg:height="10.187cm" svg:x="9.393cm" svg:y="5.305cm">
          <draw:image xlink:href="Pictures/10000201000001130000010F74E6F5164F3B7614.png" xlink:type="simple" xlink:show="embed" xlink:actuate="onLoad">
            <text:p/>
          </draw:image>
        </draw:frame>
        <draw:frame draw:name="Google Shape;143;p17" draw:style-name="gr1" draw:text-style-name="P1" draw:layer="layout" svg:width="7.275cm" svg:height="10.187cm" svg:x="17.198cm" svg:y="5.305cm">
          <draw:image xlink:href="Pictures/10000201000001130000010F74E6F5164F3B7614.png" xlink:type="simple" xlink:show="embed" xlink:actuate="onLoad">
            <text:p/>
          </draw:image>
        </draw:frame>
        <draw:frame draw:name="Google Shape;144;p17" draw:style-name="gr1" draw:text-style-name="P1" draw:layer="layout" svg:width="7.275cm" svg:height="10.187cm" svg:x="25.003cm" svg:y="5.305cm">
          <draw:image xlink:href="Pictures/10000201000001130000010F3422725C866E43B7.png" xlink:type="simple" xlink:show="embed" xlink:actuate="onLoad">
            <text:p/>
          </draw:image>
        </draw:frame>
        <draw:frame draw:name="Google Shape;145;p17" draw:style-name="gr1" draw:text-style-name="P1" draw:layer="layout" svg:width="1.587cm" svg:height="1.587cm" svg:x="2.126cm" svg:y="5.967cm">
          <draw:image xlink:href="Pictures/100002010000003C0000003D0DAEDE9C269490A7.png" xlink:type="simple" xlink:show="embed" xlink:actuate="onLoad">
            <text:p/>
          </draw:image>
        </draw:frame>
        <draw:custom-shape draw:name="Google Shape;146;p17" draw:style-name="gr2" draw:text-style-name="P3" draw:layer="layout" svg:width="5.917cm" svg:height="0.932cm" svg:x="2.148cm" svg:y="7.874cm">
          <text:p text:style-name="P8"><text:span text:style-name="T14">Python 3.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7" draw:style-name="gr2" draw:text-style-name="P3" draw:layer="layout" svg:width="6.357cm" svg:height="5.884cm" svg:x="1.927cm" svg:y="9.525cm">
          <text:p text:style-name="P11"><text:span text:style-name="T4">Высокая скорость разработки и богатая экосистема библиотек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17" draw:style-name="gr1" draw:text-style-name="P1" draw:layer="layout" svg:width="1.587cm" svg:height="1.587cm" svg:x="10.105cm" svg:y="5.967cm">
          <draw:image xlink:href="Pictures/100002010000003C0000003DAEF9C5618C18F87C.png" xlink:type="simple" xlink:show="embed" xlink:actuate="onLoad">
            <text:p/>
          </draw:image>
        </draw:frame>
        <draw:custom-shape draw:name="Google Shape;149;p17" draw:style-name="gr2" draw:text-style-name="P3" draw:layer="layout" svg:width="5.917cm" svg:height="0.932cm" svg:x="10.195cm" svg:y="7.874cm">
          <text:p text:style-name="P8"><text:span text:style-name="T14">PySide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2" draw:text-style-name="P3" draw:layer="layout" svg:width="6.357cm" svg:height="5.884cm" svg:x="9.852cm" svg:y="9.135cm">
          <text:p text:style-name="P11"><text:span text:style-name="T4">Официальный фреймворк Qt для создания кроссплатформенных GU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17" draw:style-name="gr1" draw:text-style-name="P1" draw:layer="layout" svg:width="1.587cm" svg:height="1.587cm" svg:x="17.841cm" svg:y="5.999cm">
          <draw:image xlink:href="Pictures/100002010000003C0000003DAEF9C5618C18F87C.png" xlink:type="simple" xlink:show="embed" xlink:actuate="onLoad">
            <text:p/>
          </draw:image>
        </draw:frame>
        <draw:custom-shape draw:name="Google Shape;152;p17" draw:style-name="gr2" draw:text-style-name="P3" draw:layer="layout" svg:width="5.917cm" svg:height="0.932cm" svg:x="17.877cm" svg:y="7.874cm">
          <text:p text:style-name="P8"><text:span text:style-name="T14">QtCha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2" draw:text-style-name="P3" draw:layer="layout" svg:width="6.357cm" svg:height="5.884cm" svg:x="17.657cm" svg:y="9.611cm">
          <text:p text:style-name="P11"><text:span text:style-name="T4">Встроенная визуализация данных без лишних зависимосте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17" draw:style-name="gr1" draw:text-style-name="P1" draw:layer="layout" svg:width="1.587cm" svg:height="1.587cm" svg:x="25.683cm" svg:y="5.967cm">
          <draw:image xlink:href="Pictures/100002010000003C0000003DF7D2342EAE43F1D0.png" xlink:type="simple" xlink:show="embed" xlink:actuate="onLoad">
            <text:p/>
          </draw:image>
        </draw:frame>
        <draw:custom-shape draw:name="Google Shape;155;p17" draw:style-name="gr2" draw:text-style-name="P3" draw:layer="layout" svg:width="5.917cm" svg:height="0.932cm" svg:x="25.802cm" svg:y="7.874cm">
          <text:p text:style-name="P8"><text:span text:style-name="T14">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7" draw:style-name="gr2" draw:text-style-name="P3" draw:layer="layout" svg:width="7.037cm" svg:height="5.884cm" svg:x="25.242cm" svg:y="9.135cm">
          <text:p text:style-name="P11"><text:span text:style-name="T4">Легковесный формат для локального хранения базы заданий и статисти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17" draw:style-name="gr1" draw:text-style-name="P1" draw:layer="layout" svg:width="0.555cm" svg:height="0.634cm" svg:x="2.642cm" svg:y="6.443cm">
          <draw:image xlink:href="Pictures/10000201000000160000001983331A9F0C0F5048.png" xlink:type="simple" xlink:show="embed" xlink:actuate="onLoad">
            <text:p/>
          </draw:image>
        </draw:frame>
        <draw:frame draw:name="Google Shape;158;p17" draw:style-name="gr1" draw:text-style-name="P1" draw:layer="layout" svg:width="0.634cm" svg:height="0.634cm" svg:x="10.581cm" svg:y="6.443cm">
          <draw:image xlink:href="Pictures/100002010000001800000019E4F7867F0A818739.png" xlink:type="simple" xlink:show="embed" xlink:actuate="onLoad">
            <text:p/>
          </draw:image>
        </draw:frame>
        <draw:frame draw:name="Google Shape;159;p17" draw:style-name="gr1" draw:text-style-name="P1" draw:layer="layout" svg:width="0.634cm" svg:height="0.634cm" svg:x="18.318cm" svg:y="6.443cm">
          <draw:image xlink:href="Pictures/1000020100000018000000196784DA4486E86347.png" xlink:type="simple" xlink:show="embed" xlink:actuate="onLoad">
            <text:p/>
          </draw:image>
        </draw:frame>
        <draw:frame draw:name="Google Shape;160;p17" draw:style-name="gr1" draw:text-style-name="P1" draw:layer="layout" svg:width="0.555cm" svg:height="0.634cm" svg:x="26.199cm" svg:y="6.476cm">
          <draw:image xlink:href="Pictures/100002010000001600000019735EC6B686C33E68.png" xlink:type="simple" xlink:show="embed" xlink:actuate="onLoad">
            <text:p/>
          </draw:image>
        </draw:frame>
        <draw:custom-shape draw:name="Google Shape;161;p17" draw:style-name="gr2" draw:text-style-name="P3" draw:layer="layout" svg:width="32.226cm" svg:height="1.884cm" svg:x="1.588cm" svg:y="1.588cm">
          <text:p text:style-name="P7"><text:span text:style-name="T9">Технологический </text:span><text:span text:style-name="T10">сте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7;p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p5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frame draw:name="Google Shape;166;p18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167;p18" draw:style-name="gr1" draw:text-style-name="P1" draw:layer="layout" svg:width="14.551cm" svg:height="10.582cm" svg:x="17.727cm" svg:y="5.548cm">
          <draw:image xlink:href="Pictures/100002010000022600000191FE93D2830FD5B699.png" xlink:type="simple" xlink:show="embed" xlink:actuate="onLoad">
            <text:p/>
          </draw:image>
        </draw:frame>
        <draw:custom-shape draw:name="Google Shape;168;p18" draw:style-name="gr2" draw:text-style-name="P3" draw:layer="layout" svg:width="15.279cm" svg:height="0.932cm" svg:x="1.439cm" svg:y="5.465cm">
          <text:p text:style-name="P8"><text:span text:style-name="T15">Модульная структур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8" draw:style-name="gr2" draw:text-style-name="P3" draw:layer="layout" svg:width="14.552cm" svg:height="4.466cm" svg:x="1.439cm" svg:y="7.155cm">
          <text:p text:style-name="P12"><text:span text:style-name="T6">Приложение построено на принципах ООП с четким разделением ответственност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18" draw:style-name="gr1" draw:text-style-name="P1" draw:layer="layout" svg:width="14.498cm" svg:height="10.529cm" svg:x="17.754cm" svg:y="5.574cm">
          <draw:image xlink:href="Pictures/100002010000022600000191B01971C976712023.png" xlink:type="simple" xlink:show="embed" xlink:actuate="onLoad">
            <text:p/>
          </draw:image>
        </draw:frame>
        <draw:custom-shape draw:name="Google Shape;171;p18" draw:style-name="gr6" draw:text-style-name="P3" draw:layer="layout" svg:width="14.552cm" svg:height="1.354cm" svg:x="1.588cm" svg:y="11.708cm">
          <text:p text:style-name="P12"><text:span text:style-name="T16">UI Layer:</text:span><text:span text:style-name="T4"> Пакет ui/ (PySide6 widg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8" draw:style-name="gr7" draw:text-style-name="P3" draw:layer="layout" svg:width="14.552cm" svg:height="1.354cm" svg:x="1.439cm" svg:y="13.373cm">
          <text:p text:style-name="P12"><text:span text:style-name="T16">Logic Layer:</text:span><text:span text:style-name="T4"> TaskManager, Stats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8" draw:style-name="gr8" draw:text-style-name="P3" draw:layer="layout" svg:width="14.552cm" svg:height="1.354cm" svg:x="1.802cm" svg:y="15.038cm">
          <text:p text:style-name="P12"><text:span text:style-name="T16">Data Layer:</text:span><text:span text:style-name="T4"> JSON файлы задани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18" draw:style-name="gr1" draw:text-style-name="P1" draw:layer="layout" svg:width="0.608cm" svg:height="0.555cm" svg:x="1.482cm" svg:y="11.962cm">
          <draw:image xlink:href="Pictures/100002010000001700000015B8917D5FD2D731F2.png" xlink:type="simple" xlink:show="embed" xlink:actuate="onLoad">
            <text:p/>
          </draw:image>
        </draw:frame>
        <draw:frame draw:name="Google Shape;175;p18" draw:style-name="gr1" draw:text-style-name="P1" draw:layer="layout" svg:width="0.66cm" svg:height="0.555cm" svg:x="1.324cm" svg:y="13.523cm">
          <draw:image xlink:href="Pictures/100002010000001900000015CCF54905CA8C3B41.png" xlink:type="simple" xlink:show="embed" xlink:actuate="onLoad">
            <text:p/>
          </draw:image>
        </draw:frame>
        <draw:frame draw:name="Google Shape;176;p18" draw:style-name="gr1" draw:text-style-name="P1" draw:layer="layout" svg:width="0.396cm" svg:height="0.555cm" svg:x="1.588cm" svg:y="15.187cm">
          <draw:image xlink:href="Pictures/100002010000000F00000015AC87648E78793110.png" xlink:type="simple" xlink:show="embed" xlink:actuate="onLoad">
            <text:p/>
          </draw:image>
        </draw:frame>
        <draw:custom-shape draw:name="Google Shape;177;p18" draw:style-name="gr2" draw:text-style-name="P3" draw:layer="layout" svg:width="32.226cm" svg:height="1.884cm" svg:x="1.588cm" svg:y="1.588cm">
          <text:p text:style-name="P7"><text:span text:style-name="T9">Архитектура </text:span><text:span text:style-name="T10">Model-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3;p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4;p7:notes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182;p19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183;p19" draw:style-name="gr4" draw:text-style-name="P9" draw:layer="layout" svg:width="2.645cm" svg:height="0.105cm" svg:x="15.61cm" svg:y="7.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9" draw:style-name="gr2" draw:text-style-name="P3" draw:layer="layout" svg:width="32.226cm" svg:height="2.625cm" svg:x="0.583cm" svg:y="7.355cm">
          <text:p text:style-name="P2"><text:span text:style-name="T17">Практическая </text:span><text:span text:style-name="T18">реализа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9" draw:style-name="gr2" draw:text-style-name="P3" draw:layer="layout" svg:width="30.691cm" svg:height="1.421cm" svg:x="1.351cm" svg:y="9.92cm">
          <text:p text:style-name="P13"><text:span text:style-name="T19">От проектирования интерфейса до алгоритмов аналити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9;p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p8:notes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frame draw:name="Google Shape;190;p20" draw:style-name="gr9" draw:text-style-name="P1" draw:layer="layout" svg:width="16.642cm" svg:height="9.361cm" svg:x="0.808cm" svg:y="9.628cm">
          <draw:image xlink:href="Pictures/100002010000058F000003071EC1767CF8300BF6.png" xlink:type="simple" xlink:show="embed" xlink:actuate="onLoad">
            <text:p/>
          </draw:image>
        </draw:frame>
        <draw:custom-shape draw:name="Google Shape;191;p20" draw:style-name="gr2" draw:text-style-name="P3" draw:layer="layout" svg:width="16.207cm" svg:height="1.976cm" svg:x="1.244cm" svg:y="1.125cm">
          <text:p text:style-name="P7"><text:span text:style-name="T7">Интерфейс </text:span><text:span text:style-name="T8">тренажер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0" draw:style-name="gr2" draw:text-style-name="P3" draw:layer="layout" svg:width="13.757cm" svg:height="1.354cm" svg:x="1.244cm" svg:y="3.799cm">
          <text:p text:style-name="P12"><text:span text:style-name="T4">Реализовано 3 ключевых режима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0" draw:style-name="gr7" draw:text-style-name="P3" draw:layer="layout" svg:width="13.757cm" svg:height="1.354cm" svg:x="1.244cm" svg:y="5.382cm">
          <text:p text:style-name="P12"><text:span text:style-name="T4">Обучение (теория в P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0" draw:style-name="gr7" draw:text-style-name="P3" draw:layer="layout" svg:width="13.757cm" svg:height="1.354cm" svg:x="1.08cm" svg:y="6.693cm">
          <text:p text:style-name="P12"><text:span text:style-name="T4">Тренировка (случайные задачи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0" draw:style-name="gr8" draw:text-style-name="P3" draw:layer="layout" svg:width="14.591cm" svg:height="1.354cm" svg:x="1.244cm" svg:y="8.005cm">
          <text:p text:style-name="P12"><text:span text:style-name="T4">Полный вариант (10 заданий + таймер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0" draw:style-name="gr1" draw:text-style-name="P1" draw:layer="layout" svg:width="0.66cm" svg:height="0.555cm" svg:x="1.244cm" svg:y="5.528cm">
          <draw:image xlink:href="Pictures/100002010000001900000015E296DA6174334A15.png" xlink:type="simple" xlink:show="embed" xlink:actuate="onLoad">
            <text:p/>
          </draw:image>
        </draw:frame>
        <draw:frame draw:name="Google Shape;197;p20" draw:style-name="gr1" draw:text-style-name="P1" draw:layer="layout" svg:width="0.66cm" svg:height="0.555cm" svg:x="1.111cm" svg:y="6.765cm">
          <draw:image xlink:href="Pictures/1000020100000019000000155488C46EC5AA455B.png" xlink:type="simple" xlink:show="embed" xlink:actuate="onLoad">
            <text:p/>
          </draw:image>
        </draw:frame>
        <draw:frame draw:name="Google Shape;198;p20" draw:style-name="gr1" draw:text-style-name="P1" draw:layer="layout" svg:width="0.396cm" svg:height="0.555cm" svg:x="1.244cm" svg:y="8.001cm">
          <draw:image xlink:href="Pictures/100002010000000F0000001506BDA6A71F56A779.png" xlink:type="simple" xlink:show="embed" xlink:actuate="onLoad">
            <text:p/>
          </draw:image>
        </draw:frame>
        <draw:frame draw:name="Google Shape;199;p20" draw:style-name="gr1" draw:text-style-name="P1" draw:layer="layout" svg:width="17.188cm" svg:height="9.361cm" svg:x="18.036cm" svg:y="0cm">
          <draw:image xlink:href="Pictures/100002010000058F000003070BB95EF7C5B9E744.png" xlink:type="simple" xlink:show="embed" xlink:actuate="onLoad">
            <text:p/>
          </draw:image>
        </draw:frame>
        <draw:frame draw:name="Google Shape;200;p20" draw:style-name="gr1" draw:text-style-name="P1" draw:layer="layout" svg:width="17.613cm" svg:height="9.592cm" svg:x="18.036cm" svg:y="9.501cm">
          <draw:image xlink:href="Pictures/100002010000058F00000307F6AA696C53BD7CE8.png" xlink:type="simple" xlink:show="embed" xlink:actuate="onLoad">
            <text:p/>
          </draw:image>
        </draw:frame>
        <presentation:notes draw:style-name="dp2">
          <draw:frame draw:name="Google Shape;187;p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p9:notes" draw:style-name="gr3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Google Shape;205;p21" draw:style-name="gr2" draw:text-style-name="P3" draw:layer="layout" svg:width="13.663cm" svg:height="5.955cm" svg:x="0.845cm" svg:y="6.797cm">
          <text:p text:style-name="P13"><text:span text:style-name="T20">Гистограмма позволяет мгновенно выявить "провальные" темы, требующие дополнительной отработ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1" draw:style-name="gr2" draw:text-style-name="P3" draw:layer="layout" svg:width="13.957cm" svg:height="3.953cm" svg:x="1.736cm" svg:y="1.309cm">
          <text:p text:style-name="P7"><text:span text:style-name="T7">Визуализация </text:span><text:span text:style-name="T8">прогрес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21" draw:style-name="gr1" draw:text-style-name="P1" draw:layer="layout" svg:width="13.663cm" svg:height="7.384cm" svg:x="17.85cm" svg:y="10.561cm">
          <draw:image xlink:href="Pictures/100002010000059800000306EEFAD0613BB19A68.png" xlink:type="simple" xlink:show="embed" xlink:actuate="onLoad">
            <text:p/>
          </draw:image>
        </draw:frame>
        <draw:frame draw:name="Google Shape;208;p21" draw:style-name="gr1" draw:text-style-name="P1" draw:layer="layout" svg:width="13.663cm" svg:height="6.912cm" svg:x="17.85cm" svg:y="2.412cm">
          <draw:image xlink:href="Pictures/100002010000059D000002D7B698D2FC04FC1032.png" xlink:type="simple" xlink:show="embed" xlink:actuate="onLoad">
            <text:p/>
          </draw:image>
        </draw:frame>
        <presentation:notes draw:style-name="dp2">
          <draw:frame draw:name="Google Shape;202;p1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3;p10:notes" draw:style-name="gr3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Google Shape;213;p22" draw:style-name="gr2" draw:text-style-name="P3" draw:layer="layout" svg:width="32.226cm" svg:height="1.976cm" svg:x="1.588cm" svg:y="1.588cm">
          <text:p text:style-name="P7"><text:span text:style-name="T8">Тестирование</text:span><text:span text:style-name="T7"> прилож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22" draw:style-name="gr1" draw:text-style-name="P1" draw:layer="layout" svg:width="7.66cm" svg:height="10.245cm" svg:x="25.748cm" svg:y="5.013cm">
          <draw:image xlink:href="Pictures/10000000000003BD00000500DF3FAF9C8D532A16.jpg" xlink:type="simple" xlink:show="embed" xlink:actuate="onLoad">
            <text:p/>
          </draw:image>
        </draw:frame>
        <draw:frame draw:name="Google Shape;215;p22" draw:style-name="gr1" draw:text-style-name="P1" draw:layer="layout" svg:width="14.18cm" svg:height="10.602cm" svg:x="1.587cm" svg:y="5.014cm">
          <draw:image xlink:href="Pictures/1000000000000500000003BDFFC65A0C2AEA6DC0.jpg" xlink:type="simple" xlink:show="embed" xlink:actuate="onLoad">
            <text:p/>
          </draw:image>
        </draw:frame>
        <draw:frame draw:name="Google Shape;216;p22" draw:style-name="gr1" draw:text-style-name="P1" draw:layer="layout" svg:width="7.66cm" svg:height="10.245cm" svg:x="17.082cm" svg:y="5.014cm">
          <draw:image xlink:href="Pictures/10000000000003BD00000500641004486C24D402.jpg" xlink:type="simple" xlink:show="embed" xlink:actuate="onLoad">
            <text:p/>
          </draw:image>
        </draw:frame>
        <presentation:notes draw:style-name="dp2">
          <draw:frame draw:name="Google Shape;210;g3e2bdabaa0c_3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1;g3e2bdabaa0c_3_0:notes" draw:style-name="gr3" draw:layer="layout" svg:width="12.7cm" svg:height="9.524cm" svg:x="3.176cm" svg:y="1.905cm" draw:page-number="10" presentation:class="page"/>
        </presentation:notes>
      </draw:page>
      <draw:page draw:name="page11" draw:style-name="dp3" draw:master-page-name="BLANK">
        <draw:frame draw:name="Google Shape;221;p23" draw:style-name="gr1" draw:text-style-name="P1" draw:layer="layout" svg:width="33.866cm" svg:height="19.049cm" svg:x="0cm" svg:y="0cm">
          <draw:image xlink:href="Pictures/1000020100000500000002D0474EBA12329F25FE.png" xlink:type="simple" xlink:show="embed" xlink:actuate="onLoad">
            <text:p/>
          </draw:image>
        </draw:frame>
        <draw:frame draw:name="Google Shape;222;p23" draw:style-name="gr1" draw:text-style-name="P1" draw:layer="layout" svg:width="30.691cm" svg:height="11.884cm" svg:x="1.588cm" svg:y="3.583cm">
          <draw:image xlink:href="Pictures/10000201000004880000017252AA76E4417E6188.png" xlink:type="simple" xlink:show="embed" xlink:actuate="onLoad">
            <text:p/>
          </draw:image>
        </draw:frame>
        <draw:custom-shape draw:name="Google Shape;223;p23" draw:style-name="gr2" draw:text-style-name="P3" draw:layer="layout" svg:width="28.892cm" svg:height="2.541cm" svg:x="2.487cm" svg:y="5.17cm">
          <text:p text:style-name="P2"><text:span text:style-name="T21">Демонстрация </text:span><text:span text:style-name="T22">прилож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3" draw:style-name="gr2" draw:text-style-name="P3" draw:layer="layout" svg:width="27.516cm" svg:height="1.624cm" svg:x="3.175cm" svg:y="8.557cm">
          <text:p text:style-name="P13"><text:span text:style-name="T23">Переходим к показу функционала прилож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23" draw:style-name="gr1" draw:text-style-name="P1" draw:layer="layout" svg:width="1.983cm" svg:height="2.645cm" svg:x="15.941cm" svg:y="11.234cm">
          <draw:image xlink:href="Pictures/100002010000004C000000657A1215A872EE2ADF.png" xlink:type="simple" xlink:show="embed" xlink:actuate="onLoad">
            <text:p/>
          </draw:image>
        </draw:frame>
        <presentation:notes draw:style-name="dp2">
          <draw:frame draw:name="Google Shape;218;g3e2bdabaa0c_0_27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9;g3e2bdabaa0c_0_270:notes" draw:style-name="gr3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frame draw:name="Google Shape;230;p24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231;p24" draw:style-name="gr1" draw:text-style-name="P1" draw:layer="layout" svg:width="9.789cm" svg:height="10.609cm" svg:x="1.588cm" svg:y="5.535cm">
          <draw:image xlink:href="Pictures/100002010000017200000192FAC46F2BD35CA2C7.png" xlink:type="simple" xlink:show="embed" xlink:actuate="onLoad">
            <text:p/>
          </draw:image>
        </draw:frame>
        <draw:frame draw:name="Google Shape;232;p24" draw:style-name="gr1" draw:text-style-name="P1" draw:layer="layout" svg:width="9.789cm" svg:height="10.609cm" svg:x="12.039cm" svg:y="5.535cm">
          <draw:image xlink:href="Pictures/10000201000001720000019251A2D1B5287DE443.png" xlink:type="simple" xlink:show="embed" xlink:actuate="onLoad">
            <text:p/>
          </draw:image>
        </draw:frame>
        <draw:frame draw:name="Google Shape;233;p24" draw:style-name="gr1" draw:text-style-name="P1" draw:layer="layout" svg:width="9.789cm" svg:height="10.609cm" svg:x="22.49cm" svg:y="5.535cm">
          <draw:image xlink:href="Pictures/1000020100000172000001922BA24DE5A441B409.png" xlink:type="simple" xlink:show="embed" xlink:actuate="onLoad">
            <text:p/>
          </draw:image>
        </draw:frame>
        <draw:frame draw:name="Google Shape;234;p24" draw:style-name="gr1" draw:text-style-name="P1" draw:layer="layout" svg:width="1.719cm" svg:height="1.719cm" svg:x="2.54cm" svg:y="6.487cm">
          <draw:image xlink:href="Pictures/100002010000004100000042AB5992FF76D834A5.png" xlink:type="simple" xlink:show="embed" xlink:actuate="onLoad">
            <text:p/>
          </draw:image>
        </draw:frame>
        <draw:custom-shape draw:name="Google Shape;235;p24" draw:style-name="gr2" draw:text-style-name="P3" draw:layer="layout" svg:width="8.278cm" svg:height="0.89cm" svg:x="2.54cm" svg:y="8.869cm">
          <text:p text:style-name="P8"><text:span text:style-name="T24">Цель достигну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4" draw:style-name="gr2" draw:text-style-name="P3" draw:layer="layout" svg:width="8.278cm" svg:height="4.919cm" svg:x="2.343cm" svg:y="10.244cm">
          <text:p text:style-name="P14"><text:span text:style-name="T25">Разработан полнофункциональный прототип тренажера, готовый к использованию в учебном процессе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24" draw:style-name="gr1" draw:text-style-name="P1" draw:layer="layout" svg:width="1.719cm" svg:height="1.719cm" svg:x="12.991cm" svg:y="6.487cm">
          <draw:image xlink:href="Pictures/100002010000004100000042262A5D00F3C8D065.png" xlink:type="simple" xlink:show="embed" xlink:actuate="onLoad">
            <text:p/>
          </draw:image>
        </draw:frame>
        <draw:custom-shape draw:name="Google Shape;238;p24" draw:style-name="gr2" draw:text-style-name="P3" draw:layer="layout" svg:width="8.278cm" svg:height="0.89cm" svg:x="12.991cm" svg:y="8.869cm">
          <text:p text:style-name="P8"><text:span text:style-name="T24">Гипотеза подтвержден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4" draw:style-name="gr2" draw:text-style-name="P3" draw:layer="layout" svg:width="7.884cm" svg:height="4.919cm" svg:x="12.991cm" svg:y="10.244cm">
          <text:p text:style-name="P14"><text:span text:style-name="T25">Визуальная аналитика и учет времени повышают осознанность подготовки и помогают точечно отрабатывать ошиб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24" draw:style-name="gr1" draw:text-style-name="P1" draw:layer="layout" svg:width="1.719cm" svg:height="1.719cm" svg:x="23.442cm" svg:y="6.487cm">
          <draw:image xlink:href="Pictures/10000201000000410000004232CE0790D0A27C15.png" xlink:type="simple" xlink:show="embed" xlink:actuate="onLoad">
            <text:p/>
          </draw:image>
        </draw:frame>
        <draw:custom-shape draw:name="Google Shape;241;p24" draw:style-name="gr2" draw:text-style-name="P3" draw:layer="layout" svg:width="8.278cm" svg:height="0.89cm" svg:x="23.442cm" svg:y="8.869cm">
          <text:p text:style-name="P8"><text:span text:style-name="T24">Автономн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4" draw:style-name="gr2" draw:text-style-name="P3" draw:layer="layout" svg:width="8.278cm" svg:height="3.935cm" svg:x="23.442cm" svg:y="10.244cm">
          <text:p text:style-name="P14"><text:span text:style-name="T25">Локальное десктопное решение обеспечивает стабильную работу без зависимости от интернет-соединения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24" draw:style-name="gr1" draw:text-style-name="P1" draw:layer="layout" svg:width="0.66cm" svg:height="0.74cm" svg:x="3.069cm" svg:y="6.977cm">
          <draw:image xlink:href="Pictures/10000201000000190000001D92E7475DC0D58036.png" xlink:type="simple" xlink:show="embed" xlink:actuate="onLoad">
            <text:p/>
          </draw:image>
        </draw:frame>
        <draw:frame draw:name="Google Shape;244;p24" draw:style-name="gr1" draw:text-style-name="P1" draw:layer="layout" svg:width="0.74cm" svg:height="0.74cm" svg:x="13.481cm" svg:y="6.977cm">
          <draw:image xlink:href="Pictures/100002010000001D0000001D83C85CA76C3F0A20.png" xlink:type="simple" xlink:show="embed" xlink:actuate="onLoad">
            <text:p/>
          </draw:image>
        </draw:frame>
        <draw:frame draw:name="Google Shape;245;p24" draw:style-name="gr1" draw:text-style-name="P1" draw:layer="layout" svg:width="0.74cm" svg:height="0.74cm" svg:x="23.932cm" svg:y="6.977cm">
          <draw:image xlink:href="Pictures/100002010000001D0000001DD1BBB788635682C4.png" xlink:type="simple" xlink:show="embed" xlink:actuate="onLoad">
            <text:p/>
          </draw:image>
        </draw:frame>
        <draw:custom-shape draw:name="Google Shape;246;p24" draw:style-name="gr2" draw:text-style-name="P3" draw:layer="layout" svg:width="32.226cm" svg:height="1.976cm" svg:x="1.588cm" svg:y="1.588cm">
          <text:p text:style-name="P7"><text:span text:style-name="T7">Основные </text:span><text:span text:style-name="T8">выводы</text:span><text:span text:style-name="T7"> 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7;g3e2bdabaa0c_0_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8;g3e2bdabaa0c_0_1:notes" draw:style-name="gr3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frame draw:name="Google Shape;251;p25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252;p25" draw:style-name="gr2" draw:text-style-name="P3" draw:layer="layout" svg:width="24.87cm" svg:height="2.709cm" svg:x="3.175cm" svg:y="4.85cm">
          <text:p text:style-name="P12"><text:span text:style-name="T16">Полный охват Государственных экзаменов: добавить поддержку ОГЭ и ЕГЭ по всем предмета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5" draw:style-name="gr2" draw:text-style-name="P3" draw:layer="layout" svg:width="24.87cm" svg:height="2.709cm" svg:x="3.175cm" svg:y="7.845cm">
          <text:p text:style-name="P12"><text:span text:style-name="T16">Геймификация:</text:span><text:span text:style-name="T4"> Внедрение системы достижений и уровней мастерства для мотиваци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5" draw:style-name="gr2" draw:text-style-name="P3" draw:layer="layout" svg:width="24.87cm" svg:height="2.709cm" svg:x="3.175cm" svg:y="10.84cm">
          <text:p text:style-name="P12"><text:span text:style-name="T16">Синхронизация:</text:span><text:span text:style-name="T4"> Возможность облачного бэкапа статистики для работы с разных устройст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5" draw:style-name="gr2" draw:text-style-name="P3" draw:layer="layout" svg:width="24.87cm" svg:height="2.709cm" svg:x="3.175cm" svg:y="13.834cm">
          <text:p text:style-name="P12"><text:span text:style-name="T16">AI-помощник:</text:span><text:span text:style-name="T4"> Автоматическая генерация рекомендаций на основе ошибок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5" draw:style-name="gr1" draw:text-style-name="P1" draw:layer="layout" svg:width="0.846cm" svg:height="0.899cm" svg:x="1.588cm" svg:y="5.035cm">
          <draw:image xlink:href="Pictures/1000020100000020000000224BB3F3ACE54ACDA3.png" xlink:type="simple" xlink:show="embed" xlink:actuate="onLoad">
            <text:p/>
          </draw:image>
        </draw:frame>
        <draw:frame draw:name="Google Shape;257;p25" draw:style-name="gr1" draw:text-style-name="P1" draw:layer="layout" svg:width="1.057cm" svg:height="0.899cm" svg:x="1.588cm" svg:y="8.03cm">
          <draw:image xlink:href="Pictures/100002010000002800000022F32B1B534251F3AB.png" xlink:type="simple" xlink:show="embed" xlink:actuate="onLoad">
            <text:p/>
          </draw:image>
        </draw:frame>
        <draw:frame draw:name="Google Shape;258;p25" draw:style-name="gr1" draw:text-style-name="P1" draw:layer="layout" svg:width="1.057cm" svg:height="0.899cm" svg:x="1.588cm" svg:y="11.025cm">
          <draw:image xlink:href="Pictures/1000020100000028000000228EEA06F4F9CDDE8E.png" xlink:type="simple" xlink:show="embed" xlink:actuate="onLoad">
            <text:p/>
          </draw:image>
        </draw:frame>
        <draw:frame draw:name="Google Shape;259;p25" draw:style-name="gr1" draw:text-style-name="P1" draw:layer="layout" svg:width="1.057cm" svg:height="0.899cm" svg:x="1.588cm" svg:y="14.02cm">
          <draw:image xlink:href="Pictures/1000020100000028000000226BDDC76163B5FD42.png" xlink:type="simple" xlink:show="embed" xlink:actuate="onLoad">
            <text:p/>
          </draw:image>
        </draw:frame>
        <draw:custom-shape draw:name="Google Shape;260;p25" draw:style-name="gr2" draw:text-style-name="P3" draw:layer="layout" svg:width="32.226cm" svg:height="1.976cm" svg:x="1.588cm" svg:y="1.588cm">
          <text:p text:style-name="P7"><text:span text:style-name="T7">Вектор развития </text:span><text:span text:style-name="T8">проду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8;g3e2bdabaa0c_0_9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9;g3e2bdabaa0c_0_96:notes" draw:style-name="gr3" draw:layer="layout" svg:width="12.7cm" svg:height="9.524cm" svg:x="3.176cm" svg:y="1.905cm" draw:page-number="13" presentation:class="page"/>
        </presentation:notes>
      </draw:page>
      <draw:page draw:name="page14" draw:style-name="dp1" draw:master-page-name="BLANK">
        <draw:frame draw:name="Google Shape;265;p26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266;p26" draw:style-name="gr1" draw:text-style-name="P1" draw:layer="layout" svg:width="10.582cm" svg:height="10.582cm" svg:x="19.711cm" svg:y="5.548cm">
          <draw:image xlink:href="Pictures/100002010000019000000191395B11A5C240CFB3.png" xlink:type="simple" xlink:show="embed" xlink:actuate="onLoad">
            <text:p/>
          </draw:image>
        </draw:frame>
        <draw:custom-shape draw:name="Google Shape;267;p26" draw:style-name="gr2" draw:text-style-name="P3" draw:layer="layout" svg:width="15.279cm" svg:height="1.017cm" svg:x="1.588cm" svg:y="5.265cm">
          <text:p text:style-name="P8"><text:span text:style-name="T26">Проект на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6" draw:style-name="gr2" draw:text-style-name="P3" draw:layer="layout" svg:width="14.552cm" svg:height="5.419cm" svg:x="1.588cm" svg:y="7.341cm">
          <text:p text:style-name="P12"><text:span text:style-name="T4">Весь исходный код приложения, структура JSON-базы заданий и модули аналитики размещены в открытом репозитории для ознакомления и доработ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26" draw:style-name="gr1" draw:text-style-name="P1" draw:layer="layout" svg:width="10.529cm" svg:height="10.529cm" svg:x="19.738cm" svg:y="5.574cm">
          <draw:image xlink:href="Pictures/100002010000019000000191DE863C1652F7A3EF.png" xlink:type="simple" xlink:show="embed" xlink:actuate="onLoad">
            <text:p/>
          </draw:image>
        </draw:frame>
        <draw:custom-shape draw:name="Google Shape;270;p26" draw:style-name="gr2" draw:text-style-name="P3" draw:layer="layout" svg:width="32.226cm" svg:height="2.071cm" svg:x="1.588cm" svg:y="1.588cm">
          <text:p text:style-name="P7"><text:span text:style-name="T27">Открытый </text:span><text:span text:style-name="T28">исходный ко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26" draw:style-name="gr1" draw:text-style-name="P1" draw:layer="layout" svg:width="13.546cm" svg:height="13.546cm" svg:x="18.23cm" svg:y="4.066cm">
          <draw:image xlink:href="Pictures/10000201000002000000020027149763375CC54B.png" xlink:type="simple" xlink:show="embed" xlink:actuate="onLoad">
            <text:p/>
          </draw:image>
        </draw:frame>
        <draw:custom-shape draw:name="Google Shape;272;p26" draw:style-name="gr10" draw:text-style-name="P15" draw:layer="layout" svg:width="13.827cm" svg:height="1.411cm" svg:x="1.588cm" svg:y="14.72cm">
          <text:p text:style-name="P8"><text:span text:style-name="T29">github.com/anton953/oge_ticher_app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2;g3e2bdabaa0c_0_18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3;g3e2bdabaa0c_0_185:notes" draw:style-name="gr3" draw:layer="layout" svg:width="12.7cm" svg:height="9.524cm" svg:x="3.176cm" svg:y="1.905cm" draw:page-number="14" presentation:class="page"/>
        </presentation:notes>
      </draw:page>
      <draw:page draw:name="page15" draw:style-name="dp1" draw:master-page-name="BLANK">
        <draw:frame draw:name="Google Shape;277;p27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278;p27" draw:style-name="gr2" draw:text-style-name="P3" draw:layer="layout" svg:width="21.54cm" svg:height="3.895cm" svg:x="6.163cm" svg:y="4.52cm">
          <text:p text:style-name="P2"><text:span text:style-name="T30">Благодарю за внимание к моему проекту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7" draw:style-name="gr2" draw:text-style-name="P3" draw:layer="layout" svg:width="30.691cm" svg:height="1.218cm" svg:x="1.588cm" svg:y="10.125cm">
          <text:p text:style-name="P13"><text:span text:style-name="T31">Проект "OGE Teacher App" готов к масштабированию и внедрению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7" draw:style-name="gr2" draw:text-style-name="P3" draw:layer="layout" svg:width="30.691cm" svg:height="1.609cm" svg:x="1.588cm" svg:y="11.417cm">
          <text:p text:style-name="P2"><text:span text:style-name="T32">Все задачи выполнены в полном объеме. Цель достигнута.</text:span><text:span text:style-name="T33"><text:line-break/></text:span><text:span text:style-name="T34">СПб,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4;p1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5;p12:notes" draw:style-name="gr3" draw:layer="layout" svg:width="12.7cm" svg:height="9.524cm" svg:x="3.176cm" svg:y="1.905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rbanist Medium" svg:font-family="'Urbanist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2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3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4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2"/>
    <meta:generator>LibreOfficeDev/6.0.5.2$Linux_X86_64 LibreOffice_project/</meta:generator>
  </office:meta>
</office:document-meta>
</file>