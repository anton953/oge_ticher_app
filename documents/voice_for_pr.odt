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Arial" fo:font-size="14pt" style:font-size-asian="14pt" style:font-size-complex="14pt"/>
    </style:style>
    <style:style style:name="P2" style:family="paragraph" style:parent-style-name="Heading_20_3">
      <style:text-properties style:font-name="Arial" fo:font-size="14pt" officeooo:paragraph-rsid="0019986c" style:font-size-asian="14pt" style:font-size-complex="14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Text_20_body">
      <style:text-properties style:font-name="Arial" fo:font-size="14pt" style:font-size-asian="14pt" style:font-size-complex="14pt"/>
    </style:style>
    <style:style style:name="P5" style:family="paragraph" style:parent-style-name="Text_20_body" style:list-style-name="L1">
      <style:text-properties style:font-name="Arial" fo:font-size="14pt" style:font-size-asian="14pt" style:font-size-complex="14pt"/>
    </style:style>
    <style:style style:name="P6" style:family="paragraph" style:parent-style-name="Text_20_body">
      <style:text-properties style:font-name="Arial" fo:font-size="14pt" officeooo:paragraph-rsid="0019986c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986c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officeooo:rsid="0019986c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Слайд 1: Титульный</text:h>
      <text:p text:style-name="P4"><text:span text:style-name="T2">Здравствуйте</text:span>, <text:span text:style-name="T2">уважаемые</text:span> члены комиссии и слушатели! Меня зовут <text:span text:style-name="T2">Душенков Антон</text:span>, я ученик 10В класса. Представляю вашему вниманию мой проект: <text:span text:style-name="T3">И</text:span><text:span text:style-name="T2">нтерактивный тренажер для подготовки к ОГЭ по информатике.</text:span> </text:p>
      <text:h text:style-name="P1" text:outline-level="3">Слайд 2: Цели и задачи</text:h>
      <text:p text:style-name="P4"><text:span text:style-name="T2">Основная</text:span> цель моей работы — <text:span text:style-name="T2">разработать</text:span> на языке Python программное обеспечение, которое <text:span text:style-name="T2">автоматизирует</text:span> процесс подготовки и <text:span text:style-name="T2">пов</text:span><text:span text:style-name="T3">ысит</text:span> эффективность <text:span text:style-name="T2">самоконтроля</text:span> учеников. Для достижения цели я решил ряд задач: <text:span text:style-name="T2">проанализировал</text:span> требования ФИПИ 2026 года, <text:span text:style-name="T2">реализовал</text:span> модули тестирования и учета времени, а также <text:span text:style-name="T2">внедрил</text:span> инструменты визуальной аналитики для поиска <text:span text:style-name="T2">слабых мест</text:span> в знаниях.</text:p>
      <text:h text:style-name="P2" text:outline-level="3">Слайд <text:span text:style-name="T5">3</text:span>: Потребности аудитории</text:h>
      <text:p text:style-name="P6">Чтобы подтвердить актуальность проекта, я провел анкетирование среди учащихся 9-х классов нашего лицея. Результаты показали, что 84% учеников заинтересованы в использовании именно десктопного ПО, которое позволяет готовиться в условиях школы или дома, не отвлекаясь на веб-ресурсы.</text:p>
      <text:h text:style-name="P1" text:outline-level="3">Слайд <text:span text:style-name="T5">4</text:span>: Анализ существующих решений</text:h>
      <text:p text:style-name="P4">Перед началом <text:span text:style-name="T2">разработки</text:span> я провел <text:span text:style-name="T2">сравнительный</text:span> анализ популярных ресурсов, таких как «<text:span text:style-name="T2">Решу ОГЭ</text:span>» и «<text:span text:style-name="T2">Банк заданий ФИПИ</text:span>». <text:span text:style-name="T2">Главные</text:span> преимущества моего приложения — это <text:span text:style-name="T2">глубокая</text:span> персональная аналитика на базе библиотеки <text:span text:style-name="T2">QtCharts</text:span>, <text:span text:style-name="T6">полная</text:span> <text:span text:style-name="T2">автономность</text:span> и современный интерфейс на фреймворке <text:span text:style-name="T2">PySide6</text:span>. В отличие от аналогов, мой тренажер <text:span text:style-name="T2">позволяет</text:span> вести <text:span text:style-name="T2">индивидуальный</text:span> трекинг времени по каждой задаче.</text:p>
      <text:h text:style-name="P1" text:outline-level="3">Слайд <text:span text:style-name="T5">5</text:span>: Технологический стек</text:h>
      <text:p text:style-name="P4"><text:span text:style-name="T1">Речь:</text:span> Выбор технологий был обусловлен <text:span text:style-name="T2">необходимостью</text:span> создать быстрое и <text:span text:style-name="T2">кроссплатформенное</text:span> решение. Я использовал Python 3.12 и библиотеку PySide6 для создания GUI. Для графиков использовался модуль QtCharts, а база заданий и статистика <text:span text:style-name="T2">хранятся</text:span> в легковесном формате JSON, что <text:span text:style-name="T2">обеспечивает</text:span> высокую скорость работы приложения.</text:p>
      <text:h text:style-name="P1" text:outline-level="3"><text:soft-page-break/>Слайд 6: Архитектура Model-View</text:h>
      <text:p text:style-name="P4">Приложение <text:span text:style-name="T2">спроектировано</text:span> на принципах <text:span text:style-name="T2">объектно-ориентированного программирования</text:span> с использованием архитектурного паттерна <text:span text:style-name="T2">MVC</text:span> (Model-View-Controller). Это <text:span text:style-name="T2">позволило</text:span> четко разделить <text:span text:style-name="T2">интерфейс</text:span>, <text:span text:style-name="T2">логику</text:span> обработки задач и уровень <text:span text:style-name="T2">хранения</text:span> <text:span text:style-name="T2">данных</text:span>. Такая структура <text:span text:style-name="T2">делает</text:span> <text:span text:style-name="T2">код</text:span> легко масштабируемым.</text:p>
      <text:h text:style-name="P1" text:outline-level="3">Слайд 7: Интерфейс тренажера (Практическая реализация)</text:h>
      <text:p text:style-name="P4">В приложении <text:span text:style-name="T2">реализовано</text:span> три ключевых режима работы:</text:p>
      <text:list text:style-name="L1">
        <text:list-item>
          <text:p text:style-name="P5"><text:span text:style-name="T1">Обучение:</text:span> где представлена необходимая теория.</text:p>
        </text:list-item>
        <text:list-item>
          <text:p text:style-name="P5"><text:span text:style-name="T1">Тренировка:</text:span> решение случайных задач по темам.</text:p>
        </text:list-item>
        <text:list-item>
          <text:p text:style-name="P5"><text:span text:style-name="T1">Полный вариант:</text:span> имитация реального экзамена из 10 заданий с использованием QTimer для отслеживания времени решения.</text:p>
        </text:list-item>
      </text:list>
      <text:h text:style-name="P1" text:outline-level="3">Слайд 8: Визуализация прогресса</text:h>
      <text:p text:style-name="P4">Особое внимание я <text:span text:style-name="T2">уделил</text:span> модулю статистики. Приложение <text:span text:style-name="T2">строит</text:span> гистограмму <text:span text:style-name="T2">успеваемости</text:span> по номерам заданий. Это позволяет ученику <text:span text:style-name="T2">мгновенно увидеть</text:span> «провальные» темы (например, как на графике — задачи №3 или №7) и <text:span text:style-name="T2">сфокусировать</text:span> усилия именно на них.</text:p>
      <text:h text:style-name="P1" text:outline-level="3">Слайд 9: Тестирование приложения</text:h>
      <text:p text:style-name="P4">Прототип приложения <text:span text:style-name="T2">прошел успешное тестирование</text:span> в компьютерном классе нашего лицея. Ученики <text:span text:style-name="T6">отметили</text:span> <text:span text:style-name="T2">удобство</text:span> <text:span text:style-name="T2">интерфейса</text:span> и <text:span text:style-name="T2">полезность мгновенной обратной связи</text:span> при решении задач.</text:p>
      <text:h text:style-name="P2" text:outline-level="3">Слайд 10: Основные выводы проекта</text:h>
      <text:p text:style-name="P6"><text:span text:style-name="T2">Подводя</text:span> итоги, <text:span text:style-name="T5">можно</text:span> сказать: цель проекта <text:span text:style-name="T2">достигнута</text:span>. Разработан <text:span text:style-name="T2">полнофункциональный</text:span> прототип, который <text:span text:style-name="T2">подтвердил</text:span> гипотезу — <text:span text:style-name="T2">визуальная</text:span> аналитика и <text:span text:style-name="T2">учет</text:span> времени действительно <text:span text:style-name="T2">повышают</text:span> осознанность подготовки. Главное — приложение <text:span text:style-name="T2">полностью</text:span> автономно.</text:p>
      <text:h text:style-name="P1" text:outline-level="3">Слайд 11: Демонстрация приложения</text:h>
      <text:p text:style-name="P4">А сейчас я готов перейти к <text:span text:style-name="T2">показу</text:span> функционала <text:span text:style-name="T5">приложения</text:span>.</text:p>
      <text:h text:style-name="P1" text:outline-level="3"><text:soft-page-break/>Слайд 12: Вектор развития продукта</text:h>
      <text:p text:style-name="P4">У проекта <text:span text:style-name="T6">большой</text:span> <text:span text:style-name="T2">потенциал</text:span>. В будущем я планирую <text:span text:style-name="T2">добавить</text:span> оставшиеся 5 задач КИМ (программирование и Excel), <text:span text:style-name="T2">внедрить</text:span> систему <text:span text:style-name="T2">геймификации</text:span> для <text:span text:style-name="T6">мотивации</text:span> и <text:span text:style-name="T2">разработать</text:span> AI-помощника, который будет <text:span text:style-name="T2">давать</text:span> персональные советы на основе <text:span text:style-name="T2">ошибок</text:span>.</text:p>
      <text:h text:style-name="P1" text:outline-level="3">Слайд 13: Открытый исходный код</text:h>
      <text:p text:style-name="P4">Проект <text:span text:style-name="T2">является</text:span> открытым. Исходный код и структура базы заданий <text:span text:style-name="T2">размещены</text:span> в моем репозитории на GitHub, ссылка <text:span text:style-name="T2">представлена</text:span> на слайде.</text:p>
      <text:h text:style-name="P1" text:outline-level="3">Слайд 14-15: Заключение и вопросы</text:h>
      <text:p text:style-name="P4">Все задачи <text:span text:style-name="T2">выполнены</text:span> в <text:span text:style-name="T2">полном</text:span> объеме, тренажер <text:span text:style-name="T2">готов</text:span> к <text:span text:style-name="T2">масштабированию</text:span> и <text:span text:style-name="T2">внедрению</text:span>. Благодарю за внимание! Готов ответить на ваши вопросы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23:04:27.220677977</meta:creation-date>
    <dc:date>2026-05-17T23:16:16.345866404</dc:date>
    <meta:editing-duration>PT17S</meta:editing-duration>
    <meta:editing-cycles>1</meta:editing-cycles>
    <meta:document-statistic meta:table-count="0" meta:image-count="0" meta:object-count="0" meta:page-count="3" meta:paragraph-count="31" meta:word-count="496" meta:character-count="3829" meta:non-whitespace-character-count="3361"/>
    <meta:generator>LibreOffice/24.2.7.2$Linux_X86_64 LibreOffice_project/420$Build-2</meta:generator>
  </office:meta>
</office:document-meta>
</file>