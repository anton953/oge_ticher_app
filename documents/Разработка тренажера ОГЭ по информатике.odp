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8800000079F29ECE37E70A801E.png" manifest:media-type="image/png"/>
  <manifest:file-entry manifest:full-path="Pictures/1000020100000438000000295783B85CA22C5236.png" manifest:media-type="image/png"/>
  <manifest:file-entry manifest:full-path="Pictures/100002010000058F00000307F6AA696C53BD7CE8.png" manifest:media-type="image/png"/>
  <manifest:file-entry manifest:full-path="Pictures/100002010000058F000003070BB95EF7C5B9E744.png" manifest:media-type="image/png"/>
  <manifest:file-entry manifest:full-path="Pictures/100002010000000F0000001506BDA6A71F56A779.png" manifest:media-type="image/png"/>
  <manifest:file-entry manifest:full-path="Pictures/1000020100000019000000155488C46EC5AA455B.png" manifest:media-type="image/png"/>
  <manifest:file-entry manifest:full-path="Pictures/100002010000003C0000003D0DAEDE9C269490A7.png" manifest:media-type="image/png"/>
  <manifest:file-entry manifest:full-path="Pictures/100002010000001800000019E4F7867F0A818739.png" manifest:media-type="image/png"/>
  <manifest:file-entry manifest:full-path="Pictures/10000201000001130000010F74E6F5164F3B7614.png" manifest:media-type="image/png"/>
  <manifest:file-entry manifest:full-path="Pictures/TablePreview1.svm" manifest:media-type=""/>
  <manifest:file-entry manifest:full-path="Pictures/100002010000001700000015B8917D5FD2D731F2.png" manifest:media-type="image/png"/>
  <manifest:file-entry manifest:full-path="Pictures/100002010000003C0000003DAEF9C5618C18F87C.png" manifest:media-type="image/png"/>
  <manifest:file-entry manifest:full-path="Pictures/100002010000001C0000001D1DAB3AD6FF22C8C0.png" manifest:media-type="image/png"/>
  <manifest:file-entry manifest:full-path="Pictures/10000201000005A00000032A4307686046270D19.png" manifest:media-type="image/png"/>
  <manifest:file-entry manifest:full-path="Pictures/100002010000003C0000003DF7D2342EAE43F1D0.png" manifest:media-type="image/png"/>
  <manifest:file-entry manifest:full-path="Pictures/100002010000001C0000001DB2E78ED066DD18A0.png" manifest:media-type="image/png"/>
  <manifest:file-entry manifest:full-path="Pictures/100002010000001600000019735EC6B686C33E68.png" manifest:media-type="image/png"/>
  <manifest:file-entry manifest:full-path="Pictures/1000020100000500000002D0902C77184B7842AF.png" manifest:media-type="image/png"/>
  <manifest:file-entry manifest:full-path="Pictures/10000201000004880000020B80EE7EBAE4D84561.png" manifest:media-type="image/png"/>
  <manifest:file-entry manifest:full-path="Pictures/100002010000000F00000015AC87648E78793110.png" manifest:media-type="image/png"/>
  <manifest:file-entry manifest:full-path="Pictures/100002010000001900000015E296DA6174334A15.png" manifest:media-type="image/png"/>
  <manifest:file-entry manifest:full-path="Pictures/10000201000000160000001983331A9F0C0F5048.png" manifest:media-type="image/png"/>
  <manifest:file-entry manifest:full-path="Pictures/1000020100000018000000196784DA4486E86347.png" manifest:media-type="image/png"/>
  <manifest:file-entry manifest:full-path="Pictures/10000201000001130000010F3422725C866E43B7.png" manifest:media-type="image/png"/>
  <manifest:file-entry manifest:full-path="Pictures/1000020100000488000001F567A080CCBE5C8971.png" manifest:media-type="image/png"/>
  <manifest:file-entry manifest:full-path="Pictures/100002010000001900000015CCF54905CA8C3B41.png" manifest:media-type="image/png"/>
  <manifest:file-entry manifest:full-path="Pictures/100002010000022600000191FE93D2830FD5B699.png" manifest:media-type="image/png"/>
  <manifest:file-entry manifest:full-path="Pictures/100002010000022600000191B01971C976712023.png" manifest:media-type="image/png"/>
  <manifest:file-entry manifest:full-path="Pictures/10000201000001130000010FB1E16BECB33026C1.png" manifest:media-type="image/png"/>
  <manifest:file-entry manifest:full-path="Pictures/100002010000058F000003071EC1767CF8300BF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ter" svg:font-family="Inter"/>
    <style:font-face style:name="Inter SemiBold" svg:font-family="'Inter SemiBold'"/>
    <style:font-face style:name="Urbanist" svg:font-family="Urbanist"/>
    <style:font-face style:name="Urbanist Medium" svg:font-family="'Urbanis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deff9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33415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873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926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661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98cm, 0cm, 0.598cm)" draw:image-opacity="100%" style:mirror="non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945cm" style:use-optimal-column-width="false"/>
    </style:style>
    <style:style style:name="co2" style:family="table-column">
      <style:table-column-properties style:column-width="5.885cm" style:use-optimal-column-width="false"/>
    </style:style>
    <style:style style:name="co3" style:family="table-column">
      <style:table-column-properties style:column-width="6.946cm" style:use-optimal-column-width="false"/>
    </style:style>
    <style:style style:name="co4" style:family="table-column">
      <style:table-column-properties style:column-width="8.915cm" style:use-optimal-column-width="false"/>
    </style:style>
    <style:style style:name="ro1" style:family="table-row">
      <style:table-row-properties style:row-height="1.74cm"/>
    </style:style>
    <style:style style:name="ro2" style:family="table-row">
      <style:table-row-properties style:row-height="1.744cm"/>
    </style:style>
    <style:style style:name="ce1" style:family="table-cell">
      <loext:graphic-properties draw:fill="solid" draw:fill-color="#1e293b" draw:textarea-vertical-align="middle" fo:padding-top="0.07cm" fo:padding-bottom="0.07cm" fo:padding-left="0.176cm" fo:padding-right="0.176cm"/>
      <style:paragraph-properties fo:border="0.37pt solid #000000"/>
    </style:style>
    <style:style style:name="ce2" style:family="table-cell">
      <loext:graphic-properties draw:fill="solid" draw:fill-color="#000000" draw:textarea-vertical-align="middle" fo:padding-top="0.07cm" fo:padding-bottom="0.07cm" fo:padding-left="0.176cm" fo:padding-right="0.176cm"/>
      <style:paragraph-properties fo:border="0.37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59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9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deff9a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34155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39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6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deff9a" style:text-line-through-style="none" style:text-line-through-type="none" style:text-position="0% 100%" style:font-name="Urbanist Medium" fo:font-size="62pt" fo:letter-spacing="normal" fo:font-style="normal" style:text-underline-style="none" fo:font-weight="normal" style:font-name-asian="Urbanist Medium" style:font-size-asian="62pt" style:font-style-asian="normal" style:font-weight-asian="normal" style:font-name-complex="Urbanist Medium" style:font-size-complex="62pt" style:font-style-complex="normal" style:font-weight-complex="normal"/>
    </style:style>
    <style:style style:name="T2" style:family="text">
      <style:text-properties fo:font-variant="normal" fo:text-transform="none" fo:color="#f5f5f5" style:text-line-through-style="none" style:text-line-through-type="none" style:text-position="0% 100%" style:font-name="Urbanist Medium" fo:font-size="62pt" fo:letter-spacing="normal" fo:font-style="normal" style:text-underline-style="none" fo:font-weight="normal" style:font-name-asian="Urbanist Medium" style:font-size-asian="62pt" style:font-style-asian="normal" style:font-weight-asian="normal" style:font-name-complex="Urbanist Medium" style:font-size-complex="62pt" style:font-style-complex="normal" style:font-weight-complex="normal"/>
    </style:style>
    <style:style style:name="T3" style:family="text">
      <style:text-properties fo:font-variant="normal" fo:text-transform="none" fo:color="#eeece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cbd5e1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5" style:family="text">
      <style:text-properties fo:font-variant="normal" fo:text-transform="none" fo:color="#cbd5e1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6" style:family="text">
      <style:text-properties fo:font-variant="normal" fo:text-transform="none" fo:color="#deff9a" style:text-line-through-style="none" style:text-line-through-type="none" style:text-position="0% 100%" style:font-name="Urbanist" fo:font-size="135pt" fo:letter-spacing="normal" fo:font-style="normal" style:text-underline-style="none" fo:font-weight="bold" style:font-name-asian="Urbanist" style:font-size-asian="135pt" style:font-style-asian="normal" style:font-weight-asian="bold" style:font-name-complex="Urbanist" style:font-size-complex="135pt" style:font-style-complex="normal" style:font-weight-complex="bold"/>
    </style:style>
    <style:style style:name="T7" style:family="text">
      <style:text-properties fo:font-variant="normal" fo:text-transform="none" fo:color="#f5f5f5" style:text-line-through-style="none" style:text-line-through-type="none" style:text-position="0% 100%" style:font-name="Urbanist Medium" fo:font-size="24pt" fo:letter-spacing="normal" fo:font-style="normal" style:text-underline-style="none" fo:font-weight="normal" style:font-name-asian="Urbanist Medium" style:font-size-asian="24pt" style:font-style-asian="normal" style:font-weight-asian="normal" style:font-name-complex="Urbanist Medium" style:font-size-complex="24pt" style:font-style-complex="normal" style:font-weight-complex="normal"/>
    </style:style>
    <style:style style:name="T8" style:family="text">
      <style:text-properties fo:font-variant="normal" fo:text-transform="none" fo:color="#f5f5f5" style:text-line-through-style="none" style:text-line-through-type="none" style:text-position="0% 100%" style:font-name="Urbanist Medium" fo:font-size="14.1000003814697pt" fo:letter-spacing="normal" fo:font-style="normal" style:text-underline-style="none" fo:font-weight="normal" style:font-name-asian="Urbanist Medium" style:font-size-asian="14.1000003814697pt" style:font-style-asian="normal" style:font-weight-asian="normal" style:font-name-complex="Urbanist Medium" style:font-size-complex="14.1000003814697pt" style:font-style-complex="normal" style:font-weight-complex="normal"/>
    </style:style>
    <style:style style:name="T9" style:family="text">
      <style:text-properties fo:font-variant="normal" fo:text-transform="none" fo:color="#cbd5e1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10" style:family="text">
      <style:text-properties fo:font-variant="normal" fo:text-transform="none" fo:color="#f5f5f5" style:text-line-through-style="none" style:text-line-through-type="none" style:text-position="0% 100%" style:font-name="Urbanist Medium" fo:font-size="40.5pt" fo:letter-spacing="normal" fo:font-style="normal" style:text-underline-style="none" fo:font-weight="normal" style:font-name-asian="Urbanist Medium" style:font-size-asian="40.5pt" style:font-style-asian="normal" style:font-weight-asian="normal" style:font-name-complex="Urbanist Medium" style:font-size-complex="40.5pt" style:font-style-complex="normal" style:font-weight-complex="normal"/>
    </style:style>
    <style:style style:name="T11" style:family="text">
      <style:text-properties fo:font-variant="normal" fo:text-transform="none" fo:color="#deff9a" style:text-line-through-style="none" style:text-line-through-type="none" style:text-position="0% 100%" style:font-name="Urbanist Medium" fo:font-size="40.5pt" fo:letter-spacing="normal" fo:font-style="normal" style:text-underline-style="none" fo:font-weight="normal" style:font-name-asian="Urbanist Medium" style:font-size-asian="40.5pt" style:font-style-asian="normal" style:font-weight-asian="normal" style:font-name-complex="Urbanist Medium" style:font-size-complex="40.5pt" style:font-style-complex="normal" style:font-weight-complex="normal"/>
    </style:style>
    <style:style style:name="T12" style:family="text">
      <style:text-properties fo:font-variant="normal" fo:text-transform="none" fo:color="#cbd5e1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3" style:family="text">
      <style:text-properties fo:font-variant="normal" fo:text-transform="none" fo:color="#cbd5e1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f5f5f5" style:text-line-through-style="none" style:text-line-through-type="none" style:text-position="0% 100%" style:font-name="Arial" fo:font-size="42.5pt" fo:letter-spacing="normal" fo:font-style="normal" style:text-underline-style="none" fo:font-weight="normal" style:font-name-asian="Arial" style:font-size-asian="42.5pt" style:font-style-asian="normal" style:font-weight-asian="normal" style:font-name-complex="Arial" style:font-size-complex="42.5pt" style:font-style-complex="normal" style:font-weight-complex="normal"/>
    </style:style>
    <style:style style:name="T15" style:family="text">
      <style:text-properties fo:font-variant="normal" fo:text-transform="none" fo:color="#deff9a" style:text-line-through-style="none" style:text-line-through-type="none" style:text-position="0% 100%" style:font-name="Arial" fo:font-size="42.5pt" fo:letter-spacing="normal" fo:font-style="normal" style:text-underline-style="none" fo:font-weight="normal" style:font-name-asian="Arial" style:font-size-asian="42.5pt" style:font-style-asian="normal" style:font-weight-asian="normal" style:font-name-complex="Arial" style:font-size-complex="42.5pt" style:font-style-complex="normal" style:font-weight-complex="normal"/>
    </style:style>
    <style:style style:name="T16" style:family="text">
      <style:text-properties fo:font-variant="normal" fo:text-transform="none" fo:color="#deff9a" style:text-line-through-style="none" style:text-line-through-type="none" style:text-position="0% 100%" style:font-name="Urbanist" fo:font-size="16.5pt" fo:letter-spacing="normal" fo:font-style="normal" style:text-underline-style="none" fo:font-weight="bold" style:font-name-asian="Urbanist" style:font-size-asian="16.5pt" style:font-style-asian="normal" style:font-weight-asian="bold" style:font-name-complex="Urbanist" style:font-size-complex="16.5pt" style:font-style-complex="normal" style:font-weight-complex="bold"/>
    </style:style>
    <style:style style:name="T17" style:family="text">
      <style:text-properties fo:font-variant="normal" fo:text-transform="none" fo:color="#f8fafc" style:text-line-through-style="none" style:text-line-through-type="none" style:text-position="0% 100%" style:font-name="Urbanist" fo:font-size="15pt" fo:letter-spacing="normal" fo:font-style="normal" style:text-underline-style="none" fo:font-weight="normal" style:font-name-asian="Urbanist" style:font-size-asian="15pt" style:font-style-asian="normal" style:font-weight-asian="normal" style:font-name-complex="Urbanist" style:font-size-complex="15pt" style:font-style-complex="normal" style:font-weight-complex="normal"/>
    </style:style>
    <style:style style:name="T18" style:family="text">
      <style:text-properties fo:font-variant="normal" fo:text-transform="none" fo:color="#deff9a" style:text-line-through-style="none" style:text-line-through-type="none" style:text-position="0% 100%" style:font-name="Urbanist" fo:font-size="15pt" fo:letter-spacing="normal" fo:font-style="normal" style:text-underline-style="none" fo:font-weight="normal" style:font-name-asian="Urbanist" style:font-size-asian="15pt" style:font-style-asian="normal" style:font-weight-asian="normal" style:font-name-complex="Urbanist" style:font-size-complex="15pt" style:font-style-complex="normal" style:font-weight-complex="normal"/>
    </style:style>
    <style:style style:name="T19" style:family="text">
      <style:text-properties fo:font-variant="normal" fo:text-transform="none" fo:color="#deff9a" style:text-line-through-style="none" style:text-line-through-type="none" style:text-position="0% 100%" style:font-name="Urbanist Medium" fo:font-size="18pt" fo:letter-spacing="normal" fo:font-style="normal" style:text-underline-style="none" fo:font-weight="normal" style:font-name-asian="Urbanist Medium" style:font-size-asian="18pt" style:font-style-asian="normal" style:font-weight-asian="normal" style:font-name-complex="Urbanist Medium" style:font-size-complex="18pt" style:font-style-complex="normal" style:font-weight-complex="normal"/>
    </style:style>
    <style:style style:name="T20" style:family="text">
      <style:text-properties fo:font-variant="normal" fo:text-transform="none" fo:color="#cbd5e1" style:text-line-through-style="none" style:text-line-through-type="none" style:text-position="0% 100%" style:font-name="Inter" fo:font-size="12pt" fo:letter-spacing="normal" fo:font-style="normal" style:text-underline-style="none" fo:font-weight="normal" style:font-name-asian="Inter" style:font-size-asian="12pt" style:font-style-asian="normal" style:font-weight-asian="normal" style:font-name-complex="Inter" style:font-size-complex="12pt" style:font-style-complex="normal" style:font-weight-complex="normal"/>
    </style:style>
    <style:style style:name="T21" style:family="text">
      <style:text-properties fo:font-variant="normal" fo:text-transform="none" fo:color="#cbd5e1" style:text-line-through-style="none" style:text-line-through-type="none" style:text-position="0% 100%" style:font-name="Inter" fo:font-size="15pt" fo:letter-spacing="normal" fo:font-style="normal" style:text-underline-style="none" fo:font-weight="bold" style:font-name-asian="Inter" style:font-size-asian="15pt" style:font-style-asian="normal" style:font-weight-asian="bold" style:font-name-complex="Inter" style:font-size-complex="15pt" style:font-style-complex="normal" style:font-weight-complex="bold"/>
    </style:style>
    <style:style style:name="T22" style:family="text">
      <style:text-properties fo:font-variant="normal" fo:text-transform="none" fo:color="#f5f5f5" style:text-line-through-style="none" style:text-line-through-type="none" style:text-position="0% 100%" style:font-name="Urbanist Medium" fo:font-size="60pt" fo:letter-spacing="normal" fo:font-style="normal" style:text-underline-style="none" fo:font-weight="normal" style:font-name-asian="Urbanist Medium" style:font-size-asian="60pt" style:font-style-asian="normal" style:font-weight-asian="normal" style:font-name-complex="Urbanist Medium" style:font-size-complex="60pt" style:font-style-complex="normal" style:font-weight-complex="normal"/>
    </style:style>
    <style:style style:name="T23" style:family="text">
      <style:text-properties fo:font-variant="normal" fo:text-transform="none" fo:color="#deff9a" style:text-line-through-style="none" style:text-line-through-type="none" style:text-position="0% 100%" style:font-name="Urbanist Medium" fo:font-size="60pt" fo:letter-spacing="normal" fo:font-style="normal" style:text-underline-style="none" fo:font-weight="normal" style:font-name-asian="Urbanist Medium" style:font-size-asian="60pt" style:font-style-asian="normal" style:font-weight-asian="normal" style:font-name-complex="Urbanist Medium" style:font-size-complex="6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Inter" fo:font-size="19pt" fo:letter-spacing="normal" fo:font-style="normal" style:text-underline-style="none" fo:font-weight="normal" style:font-name-asian="Inter" style:font-size-asian="19pt" style:font-style-asian="normal" style:font-weight-asian="normal" style:font-name-complex="Inter" style:font-size-complex="19pt" style:font-style-complex="normal" style:font-weight-complex="normal"/>
    </style:style>
    <style:style style:name="T25" style:family="text">
      <style:text-properties fo:font-variant="normal" fo:text-transform="none" fo:color="#deff9a" style:text-line-through-style="none" style:text-line-through-type="none" style:text-position="0% 100%" style:font-name="Inter SemiBold" fo:font-size="15pt" fo:letter-spacing="normal" fo:font-style="normal" style:text-underline-style="none" fo:font-weight="normal" style:font-name-asian="Inter SemiBold" style:font-size-asian="15pt" style:font-style-asian="normal" style:font-weight-asian="normal" style:font-name-complex="Inter SemiBold" style:font-size-complex="15pt" style:font-style-complex="normal" style:font-weight-complex="normal"/>
    </style:style>
    <style:style style:name="T26" style:family="text">
      <style:text-properties fo:font-variant="normal" fo:text-transform="none" fo:color="#deff9a" style:text-line-through-style="none" style:text-line-through-type="none" style:text-position="0% 100%" style:font-name="Urbanist Medium" fo:font-size="67.5pt" fo:letter-spacing="normal" fo:font-style="normal" style:text-underline-style="none" fo:font-weight="normal" style:font-name-asian="Urbanist Medium" style:font-size-asian="67.5pt" style:font-style-asian="normal" style:font-weight-asian="normal" style:font-name-complex="Urbanist Medium" style:font-size-complex="67.5pt" style:font-style-complex="normal" style:font-weight-complex="normal"/>
    </style:style>
    <style:style style:name="T27" style:family="text">
      <style:text-properties fo:font-variant="normal" fo:text-transform="none" fo:color="#94a3b8" style:text-line-through-style="none" style:text-line-through-type="none" style:text-position="0% 100%" style:font-name="Urbanist" fo:font-size="18pt" fo:letter-spacing="normal" fo:font-style="normal" style:text-underline-style="none" fo:font-weight="normal" style:font-name-asian="Urbanist" style:font-size-asian="18pt" style:font-style-asian="normal" style:font-weight-asian="normal" style:font-name-complex="Urbanist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9" style:family="text">
      <style:text-properties fo:font-variant="normal" fo:text-transform="none" fo:color="#deff9a" style:text-line-through-style="none" style:text-line-through-type="none" style:text-position="0% 100%" style:font-name="Urbanist" fo:font-size="18pt" fo:letter-spacing="normal" fo:font-style="normal" style:text-underline-style="none" fo:font-weight="normal" style:font-name-asian="Urbanist" style:font-size-asian="18pt" style:font-style-asian="normal" style:font-weight-asian="normal" style:font-name-complex="Urbanis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85;p13" draw:style-name="gr2" draw:text-style-name="P3" draw:layer="layout" svg:width="32.226cm" svg:height="2.625cm" svg:x="0.82cm" svg:y="6.629cm">
          <text:p text:style-name="P2"><text:span text:style-name="T1">OGE Teacher</text:span><text:span text:style-name="T2">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2" draw:text-style-name="P3" draw:layer="layout" svg:width="30.691cm" svg:height="1.479cm" svg:x="1.734cm" svg:y="9.687cm">
          <text:p text:style-name="P4"><text:span text:style-name="T3">Интерактивный тренажер для подготовки к ОГЭ по информатик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2" draw:text-style-name="P3" draw:layer="layout" svg:width="30.691cm" svg:height="2.35cm" svg:x="1.588cm" svg:y="11.409cm">
          <text:p text:style-name="P2"><text:span text:style-name="T4">Выполнил: Душенков Антон Александрович, 10В класс</text:span><text:span text:style-name="T5"><text:line-break/></text:span><text:span text:style-name="T4"> Руководитель: Келбусова С.С.</text:span><text:span text:style-name="T5"><text:line-break/></text:span><text:span text:style-name="T4"> ГБОУ Лицей № 554, СПб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2;p14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93;p14" draw:style-name="gr2" draw:text-style-name="P3" draw:layer="layout" svg:width="14.551cm" svg:height="5.714cm" svg:x="1.588cm" svg:y="7.823cm">
          <text:p text:style-name="P6"><text:span text:style-name="T6">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" draw:text-style-name="P3" draw:layer="layout" svg:width="14.551cm" svg:height="1.015cm" svg:x="1.588cm" svg:y="12.85cm">
          <text:p text:style-name="P6"><text:span text:style-name="T7">минут на решение 15 зада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" draw:text-style-name="P3" draw:layer="layout" svg:width="15.279cm" svg:height="0.596cm" svg:x="17.727cm" svg:y="8.313cm">
          <text:p text:style-name="P6"><text:span text:style-name="T8">Психологическая адапт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" draw:text-style-name="P3" draw:layer="layout" svg:width="14.551cm" svg:height="4.055cm" svg:x="17.727cm" svg:y="9.451cm">
          <text:p text:style-name="P7"><text:span text:style-name="T9">Переход на компьютерный формат требует не только теоретических знаний, но и навыков работы в цифровой среде под давлением времени. Автоматизация навыков — залог высокого балл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" draw:text-style-name="P3" draw:layer="layout" svg:width="32.225cm" svg:height="1.884cm" svg:x="1.588cm" svg:y="1.588cm">
          <text:p text:style-name="P8"><text:span text:style-name="T10">Вызов современного </text:span><text:span text:style-name="T11">экзаме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02;p15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103;p15" draw:style-name="gr2" draw:text-style-name="P3" draw:layer="layout" svg:width="22.489cm" svg:height="2.959cm" svg:x="2.91cm" svg:y="5.641cm">
          <text:p text:style-name="P9"><text:span text:style-name="T12">Цель:</text:span><text:span text:style-name="T13"> Разработать ПО на Python для автоматизации подготовки и повышения эффективности самоконтроля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2" draw:text-style-name="P3" draw:layer="layout" svg:width="22.489cm" svg:height="1.479cm" svg:x="2.91cm" svg:y="9.055cm">
          <text:p text:style-name="P9"><text:span text:style-name="T13">Проанализировать актуальные требования ФИПИ 2026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2" draw:text-style-name="P3" draw:layer="layout" svg:width="22.489cm" svg:height="2.959cm" svg:x="2.91cm" svg:y="10.964cm">
          <text:p text:style-name="P9"><text:span text:style-name="T13">Реализовать модули тестирования, учета времени и статисти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2" draw:text-style-name="P3" draw:layer="layout" svg:width="22.489cm" svg:height="1.479cm" svg:x="2.91cm" svg:y="14.377cm">
          <text:p text:style-name="P9"><text:span text:style-name="T13">Внедрить инструменты визуальной аналитики "слабых мест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5" draw:style-name="gr1" draw:text-style-name="P1" draw:layer="layout" svg:width="0.74cm" svg:height="0.766cm" svg:x="1.588cm" svg:y="6.214cm">
          <draw:image xlink:href="Pictures/100002010000001C0000001DB2E78ED066DD18A0.png" xlink:type="simple" xlink:show="embed" xlink:actuate="onLoad">
            <text:p/>
          </draw:image>
        </draw:frame>
        <draw:frame draw:name="Google Shape;108;p15" draw:style-name="gr1" draw:text-style-name="P1" draw:layer="layout" svg:width="0.74cm" svg:height="0.766cm" svg:x="1.588cm" svg:y="9.141cm">
          <draw:image xlink:href="Pictures/100002010000001C0000001D1DAB3AD6FF22C8C0.png" xlink:type="simple" xlink:show="embed" xlink:actuate="onLoad">
            <text:p/>
          </draw:image>
        </draw:frame>
        <draw:frame draw:name="Google Shape;109;p15" draw:style-name="gr1" draw:text-style-name="P1" draw:layer="layout" svg:width="0.74cm" svg:height="0.766cm" svg:x="1.588cm" svg:y="11.504cm">
          <draw:image xlink:href="Pictures/100002010000001C0000001D1DAB3AD6FF22C8C0.png" xlink:type="simple" xlink:show="embed" xlink:actuate="onLoad">
            <text:p/>
          </draw:image>
        </draw:frame>
        <draw:frame draw:name="Google Shape;110;p15" draw:style-name="gr1" draw:text-style-name="P1" draw:layer="layout" svg:width="0.74cm" svg:height="0.766cm" svg:x="1.588cm" svg:y="14.464cm">
          <draw:image xlink:href="Pictures/100002010000001C0000001D1DAB3AD6FF22C8C0.png" xlink:type="simple" xlink:show="embed" xlink:actuate="onLoad">
            <text:p/>
          </draw:image>
        </draw:frame>
        <draw:custom-shape draw:name="Google Shape;111;p15" draw:style-name="gr2" draw:text-style-name="P3" draw:layer="layout" svg:width="32.226cm" svg:height="1.976cm" svg:x="1.588cm" svg:y="1.588cm">
          <text:p text:style-name="P8"><text:span text:style-name="T14">Цели и задачи </text:span><text:span text:style-name="T15">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9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16;p16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17;p16" draw:style-name="standard" draw:layer="layout" svg:width="30.69cm" svg:height="8.703cm" svg:x="1.588cm" svg:y="6.75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6">Критерий</text:span></text:p>
              </table:table-cell>
              <table:table-cell>
                <text:p text:style-name="P6"><text:span text:style-name="T16">Решу ОГЭ</text:span></text:p>
              </table:table-cell>
              <table:table-cell>
                <text:p text:style-name="P6"><text:span text:style-name="T16">Банк ФИПИ</text:span></text:p>
              </table:table-cell>
              <table:table-cell>
                <text:p text:style-name="P6"><text:span text:style-name="T16">OGE Teacher App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7">Персональная аналитика</text:span></text:p>
              </table:table-cell>
              <table:table-cell>
                <text:p text:style-name="P6"><text:span text:style-name="T17">Поверхностная</text:span></text:p>
              </table:table-cell>
              <table:table-cell>
                <text:p text:style-name="P6"><text:span text:style-name="T17">Отсутствует</text:span></text:p>
              </table:table-cell>
              <table:table-cell>
                <text:p text:style-name="P6"><text:span text:style-name="T18">Глубокая (QtCharts)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7">Оффлайн-режим</text:span></text:p>
              </table:table-cell>
              <table:table-cell>
                <text:p text:style-name="P6"><text:span text:style-name="T17">Нет</text:span></text:p>
              </table:table-cell>
              <table:table-cell>
                <text:p text:style-name="P6"><text:span text:style-name="T17">Частично</text:span></text:p>
              </table:table-cell>
              <table:table-cell>
                <text:p text:style-name="P6"><text:span text:style-name="T18">Полная автономность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7">Учет времени (таймер)</text:span></text:p>
              </table:table-cell>
              <table:table-cell>
                <text:p text:style-name="P6"><text:span text:style-name="T17">Базовый</text:span></text:p>
              </table:table-cell>
              <table:table-cell>
                <text:p text:style-name="P6"><text:span text:style-name="T17">Нет</text:span></text:p>
              </table:table-cell>
              <table:table-cell>
                <text:p text:style-name="P6"><text:span text:style-name="T18">Индивидуальный трекинг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7">Интерфейс (UI/UX)</text:span></text:p>
              </table:table-cell>
              <table:table-cell>
                <text:p text:style-name="P6"><text:span text:style-name="T17">Устаревший</text:span></text:p>
              </table:table-cell>
              <table:table-cell>
                <text:p text:style-name="P6"><text:span text:style-name="T17">Минималистичный</text:span></text:p>
              </table:table-cell>
              <table:table-cell>
                <text:p text:style-name="P6"><text:span text:style-name="T18">Современный (PySide6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8;p16" draw:style-name="gr4" draw:text-style-name="P10" draw:layer="layout" svg:width="8.945cm" svg:height="0.052cm" svg:x="1.588cm" svg:y="8.49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4" draw:text-style-name="P10" draw:layer="layout" svg:width="5.884cm" svg:height="0.052cm" svg:x="10.533cm" svg:y="8.49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6" draw:style-name="gr4" draw:text-style-name="P10" draw:layer="layout" svg:width="6.946cm" svg:height="0.052cm" svg:x="16.419cm" svg:y="8.49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4" draw:text-style-name="P10" draw:layer="layout" svg:width="8.913cm" svg:height="0.052cm" svg:x="23.365cm" svg:y="8.49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5" draw:text-style-name="P11" draw:layer="layout" svg:width="8.945cm" svg:height="0.025cm" svg:x="1.588cm" svg:y="10.25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5" draw:text-style-name="P11" draw:layer="layout" svg:width="5.884cm" svg:height="0.025cm" svg:x="10.533cm" svg:y="10.25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5" draw:text-style-name="P11" draw:layer="layout" svg:width="6.946cm" svg:height="0.025cm" svg:x="16.419cm" svg:y="10.25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5" draw:text-style-name="P11" draw:layer="layout" svg:width="8.913cm" svg:height="0.025cm" svg:x="23.365cm" svg:y="10.258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5" draw:text-style-name="P11" draw:layer="layout" svg:width="8.945cm" svg:height="0.025cm" svg:x="1.588cm" svg:y="11.97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6" draw:style-name="gr5" draw:text-style-name="P11" draw:layer="layout" svg:width="5.884cm" svg:height="0.025cm" svg:x="10.533cm" svg:y="11.97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5" draw:text-style-name="P11" draw:layer="layout" svg:width="6.946cm" svg:height="0.025cm" svg:x="16.419cm" svg:y="11.97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5" draw:text-style-name="P11" draw:layer="layout" svg:width="8.913cm" svg:height="0.025cm" svg:x="23.365cm" svg:y="11.97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5" draw:text-style-name="P11" draw:layer="layout" svg:width="8.945cm" svg:height="0.025cm" svg:x="1.588cm" svg:y="13.69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5" draw:text-style-name="P11" draw:layer="layout" svg:width="5.884cm" svg:height="0.025cm" svg:x="10.533cm" svg:y="13.69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6" draw:style-name="gr5" draw:text-style-name="P11" draw:layer="layout" svg:width="6.946cm" svg:height="0.025cm" svg:x="16.419cm" svg:y="13.69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5" draw:text-style-name="P11" draw:layer="layout" svg:width="8.913cm" svg:height="0.025cm" svg:x="23.365cm" svg:y="13.69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5" draw:text-style-name="P11" draw:layer="layout" svg:width="8.945cm" svg:height="0.025cm" svg:x="1.588cm" svg:y="15.41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6" draw:style-name="gr5" draw:text-style-name="P11" draw:layer="layout" svg:width="5.884cm" svg:height="0.025cm" svg:x="10.533cm" svg:y="15.41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6" draw:style-name="gr5" draw:text-style-name="P11" draw:layer="layout" svg:width="6.946cm" svg:height="0.025cm" svg:x="16.419cm" svg:y="15.41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6" draw:style-name="gr5" draw:text-style-name="P11" draw:layer="layout" svg:width="8.913cm" svg:height="0.025cm" svg:x="23.365cm" svg:y="15.417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6" draw:style-name="gr2" draw:text-style-name="P3" draw:layer="layout" svg:width="32.225cm" svg:height="1.884cm" svg:x="1.588cm" svg:y="1.588cm">
          <text:p text:style-name="P8"><text:span text:style-name="T10">Анализ </text:span><text:span text:style-name="T11">существующих</text:span><text:span text:style-name="T10"> решен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3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4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43;p17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44;p17" draw:style-name="gr1" draw:text-style-name="P1" draw:layer="layout" svg:width="7.275cm" svg:height="7.147cm" svg:x="1.588cm" svg:y="7.266cm">
          <draw:image xlink:href="Pictures/10000201000001130000010FB1E16BECB33026C1.png" xlink:type="simple" xlink:show="embed" xlink:actuate="onLoad">
            <text:p/>
          </draw:image>
        </draw:frame>
        <draw:frame draw:name="Google Shape;145;p17" draw:style-name="gr1" draw:text-style-name="P1" draw:layer="layout" svg:width="7.275cm" svg:height="7.147cm" svg:x="9.393cm" svg:y="7.266cm">
          <draw:image xlink:href="Pictures/10000201000001130000010F74E6F5164F3B7614.png" xlink:type="simple" xlink:show="embed" xlink:actuate="onLoad">
            <text:p/>
          </draw:image>
        </draw:frame>
        <draw:frame draw:name="Google Shape;146;p17" draw:style-name="gr1" draw:text-style-name="P1" draw:layer="layout" svg:width="7.275cm" svg:height="7.147cm" svg:x="17.198cm" svg:y="7.266cm">
          <draw:image xlink:href="Pictures/10000201000001130000010F74E6F5164F3B7614.png" xlink:type="simple" xlink:show="embed" xlink:actuate="onLoad">
            <text:p/>
          </draw:image>
        </draw:frame>
        <draw:frame draw:name="Google Shape;147;p17" draw:style-name="gr1" draw:text-style-name="P1" draw:layer="layout" svg:width="7.275cm" svg:height="7.147cm" svg:x="25.003cm" svg:y="7.266cm">
          <draw:image xlink:href="Pictures/10000201000001130000010F3422725C866E43B7.png" xlink:type="simple" xlink:show="embed" xlink:actuate="onLoad">
            <text:p/>
          </draw:image>
        </draw:frame>
        <draw:frame draw:name="Google Shape;148;p17" draw:style-name="gr1" draw:text-style-name="P1" draw:layer="layout" svg:width="1.587cm" svg:height="1.587cm" svg:x="2.408cm" svg:y="8.086cm">
          <draw:image xlink:href="Pictures/100002010000003C0000003D0DAEDE9C269490A7.png" xlink:type="simple" xlink:show="embed" xlink:actuate="onLoad">
            <text:p/>
          </draw:image>
        </draw:frame>
        <draw:custom-shape draw:name="Google Shape;149;p17" draw:style-name="gr2" draw:text-style-name="P3" draw:layer="layout" svg:width="5.916cm" svg:height="0.763cm" svg:x="2.408cm" svg:y="10.203cm">
          <text:p text:style-name="P6"><text:span text:style-name="T19">Python 3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2" draw:text-style-name="P3" draw:layer="layout" svg:width="5.635cm" svg:height="2.111cm" svg:x="2.408cm" svg:y="11.393cm">
          <text:p text:style-name="P12"><text:span text:style-name="T20">Высокая скорость разработки и богатая экосистема библиотек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7" draw:style-name="gr1" draw:text-style-name="P1" draw:layer="layout" svg:width="1.587cm" svg:height="1.587cm" svg:x="10.213cm" svg:y="8.086cm">
          <draw:image xlink:href="Pictures/100002010000003C0000003DAEF9C5618C18F87C.png" xlink:type="simple" xlink:show="embed" xlink:actuate="onLoad">
            <text:p/>
          </draw:image>
        </draw:frame>
        <draw:custom-shape draw:name="Google Shape;152;p17" draw:style-name="gr2" draw:text-style-name="P3" draw:layer="layout" svg:width="5.916cm" svg:height="0.763cm" svg:x="10.213cm" svg:y="10.203cm">
          <text:p text:style-name="P6"><text:span text:style-name="T19">PySid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2" draw:text-style-name="P3" draw:layer="layout" svg:width="5.635cm" svg:height="2.111cm" svg:x="10.213cm" svg:y="11.393cm">
          <text:p text:style-name="P12"><text:span text:style-name="T20">Официальный фреймворк Qt для создания кроссплатформенных GU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7" draw:style-name="gr1" draw:text-style-name="P1" draw:layer="layout" svg:width="1.587cm" svg:height="1.587cm" svg:x="18.018cm" svg:y="8.086cm">
          <draw:image xlink:href="Pictures/100002010000003C0000003DAEF9C5618C18F87C.png" xlink:type="simple" xlink:show="embed" xlink:actuate="onLoad">
            <text:p/>
          </draw:image>
        </draw:frame>
        <draw:custom-shape draw:name="Google Shape;155;p17" draw:style-name="gr2" draw:text-style-name="P3" draw:layer="layout" svg:width="5.916cm" svg:height="0.763cm" svg:x="18.018cm" svg:y="10.203cm">
          <text:p text:style-name="P6"><text:span text:style-name="T19">QtCh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2" draw:text-style-name="P3" draw:layer="layout" svg:width="5.635cm" svg:height="2.111cm" svg:x="18.018cm" svg:y="11.393cm">
          <text:p text:style-name="P12"><text:span text:style-name="T20">Встроенная визуализация данных без лишних зависимосте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17" draw:style-name="gr1" draw:text-style-name="P1" draw:layer="layout" svg:width="1.587cm" svg:height="1.587cm" svg:x="25.823cm" svg:y="8.086cm">
          <draw:image xlink:href="Pictures/100002010000003C0000003DF7D2342EAE43F1D0.png" xlink:type="simple" xlink:show="embed" xlink:actuate="onLoad">
            <text:p/>
          </draw:image>
        </draw:frame>
        <draw:custom-shape draw:name="Google Shape;158;p17" draw:style-name="gr2" draw:text-style-name="P3" draw:layer="layout" svg:width="5.916cm" svg:height="0.763cm" svg:x="25.823cm" svg:y="10.203cm">
          <text:p text:style-name="P6"><text:span text:style-name="T19">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7" draw:style-name="gr2" draw:text-style-name="P3" draw:layer="layout" svg:width="5.635cm" svg:height="2.111cm" svg:x="25.823cm" svg:y="11.393cm">
          <text:p text:style-name="P12"><text:span text:style-name="T20">Легковесный формат для локального хранения базы заданий и статисти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17" draw:style-name="gr1" draw:text-style-name="P1" draw:layer="layout" svg:width="0.555cm" svg:height="0.634cm" svg:x="2.924cm" svg:y="8.562cm">
          <draw:image xlink:href="Pictures/10000201000000160000001983331A9F0C0F5048.png" xlink:type="simple" xlink:show="embed" xlink:actuate="onLoad">
            <text:p/>
          </draw:image>
        </draw:frame>
        <draw:frame draw:name="Google Shape;161;p17" draw:style-name="gr1" draw:text-style-name="P1" draw:layer="layout" svg:width="0.634cm" svg:height="0.634cm" svg:x="10.689cm" svg:y="8.562cm">
          <draw:image xlink:href="Pictures/100002010000001800000019E4F7867F0A818739.png" xlink:type="simple" xlink:show="embed" xlink:actuate="onLoad">
            <text:p/>
          </draw:image>
        </draw:frame>
        <draw:frame draw:name="Google Shape;162;p17" draw:style-name="gr1" draw:text-style-name="P1" draw:layer="layout" svg:width="0.634cm" svg:height="0.634cm" svg:x="18.494cm" svg:y="8.562cm">
          <draw:image xlink:href="Pictures/1000020100000018000000196784DA4486E86347.png" xlink:type="simple" xlink:show="embed" xlink:actuate="onLoad">
            <text:p/>
          </draw:image>
        </draw:frame>
        <draw:frame draw:name="Google Shape;163;p17" draw:style-name="gr1" draw:text-style-name="P1" draw:layer="layout" svg:width="0.555cm" svg:height="0.634cm" svg:x="26.339cm" svg:y="8.562cm">
          <draw:image xlink:href="Pictures/100002010000001600000019735EC6B686C33E68.png" xlink:type="simple" xlink:show="embed" xlink:actuate="onLoad">
            <text:p/>
          </draw:image>
        </draw:frame>
        <draw:custom-shape draw:name="Google Shape;164;p17" draw:style-name="gr2" draw:text-style-name="P3" draw:layer="layout" svg:width="32.225cm" svg:height="1.884cm" svg:x="1.588cm" svg:y="1.588cm">
          <text:p text:style-name="P8"><text:span text:style-name="T10">Технологический </text:span><text:span text:style-name="T11">сте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0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1;p5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69;p18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70;p18" draw:style-name="gr1" draw:text-style-name="P1" draw:layer="layout" svg:width="30.691cm" svg:height="13.244cm" svg:x="1.588cm" svg:y="4.217cm">
          <draw:image xlink:href="Pictures/1000020100000488000001F567A080CCBE5C8971.png" xlink:type="simple" xlink:show="embed" xlink:actuate="onLoad">
            <text:p/>
          </draw:image>
        </draw:frame>
        <draw:custom-shape draw:name="Google Shape;171;p18" draw:style-name="gr2" draw:text-style-name="P3" draw:layer="layout" svg:width="32.225cm" svg:height="1.884cm" svg:x="1.588cm" svg:y="1.588cm">
          <text:p text:style-name="P8"><text:span text:style-name="T10">Потребности </text:span><text:span text:style-name="T11">аудитор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6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7;p6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176;p19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177;p19" draw:style-name="gr1" draw:text-style-name="P1" draw:layer="layout" svg:width="14.551cm" svg:height="10.582cm" svg:x="17.727cm" svg:y="5.548cm">
          <draw:image xlink:href="Pictures/100002010000022600000191FE93D2830FD5B699.png" xlink:type="simple" xlink:show="embed" xlink:actuate="onLoad">
            <text:p/>
          </draw:image>
        </draw:frame>
        <draw:custom-shape draw:name="Google Shape;178;p19" draw:style-name="gr2" draw:text-style-name="P3" draw:layer="layout" svg:width="15.279cm" svg:height="0.596cm" svg:x="1.588cm" svg:y="7.413cm">
          <text:p text:style-name="P6"><text:span text:style-name="T8">Модульная структу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9" draw:style-name="gr2" draw:text-style-name="P3" draw:layer="layout" svg:width="14.551cm" svg:height="2.027cm" svg:x="1.588cm" svg:y="8.551cm">
          <text:p text:style-name="P7"><text:span text:style-name="T9">Приложение построено на принципах ООП с четким разделением ответственност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19" draw:style-name="gr1" draw:text-style-name="P1" draw:layer="layout" svg:width="14.498cm" svg:height="10.529cm" svg:x="17.754cm" svg:y="5.574cm">
          <draw:image xlink:href="Pictures/100002010000022600000191B01971C976712023.png" xlink:type="simple" xlink:show="embed" xlink:actuate="onLoad">
            <text:p/>
          </draw:image>
        </draw:frame>
        <draw:custom-shape draw:name="Google Shape;181;p19" draw:style-name="gr6" draw:text-style-name="P3" draw:layer="layout" svg:width="14.551cm" svg:height="1.013cm" svg:x="1.588cm" svg:y="10.774cm">
          <text:p text:style-name="P7"><text:span text:style-name="T21">UI Layer:</text:span><text:span text:style-name="T9"> Пакет ui/ (PySide6 widg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9" draw:style-name="gr7" draw:text-style-name="P3" draw:layer="layout" svg:width="14.551cm" svg:height="1.013cm" svg:x="1.588cm" svg:y="11.885cm">
          <text:p text:style-name="P7"><text:span text:style-name="T21">Logic Layer:</text:span><text:span text:style-name="T9"> TaskManager, Stats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9" draw:style-name="gr8" draw:text-style-name="P3" draw:layer="layout" svg:width="14.551cm" svg:height="1.013cm" svg:x="1.588cm" svg:y="12.996cm">
          <text:p text:style-name="P7"><text:span text:style-name="T21">Data Layer:</text:span><text:span text:style-name="T9"> JSON файлы задан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19" draw:style-name="gr1" draw:text-style-name="P1" draw:layer="layout" svg:width="0.608cm" svg:height="0.555cm" svg:x="1.588cm" svg:y="10.919cm">
          <draw:image xlink:href="Pictures/100002010000001700000015B8917D5FD2D731F2.png" xlink:type="simple" xlink:show="embed" xlink:actuate="onLoad">
            <text:p/>
          </draw:image>
        </draw:frame>
        <draw:frame draw:name="Google Shape;185;p19" draw:style-name="gr1" draw:text-style-name="P1" draw:layer="layout" svg:width="0.66cm" svg:height="0.555cm" svg:x="1.588cm" svg:y="12.03cm">
          <draw:image xlink:href="Pictures/100002010000001900000015CCF54905CA8C3B41.png" xlink:type="simple" xlink:show="embed" xlink:actuate="onLoad">
            <text:p/>
          </draw:image>
        </draw:frame>
        <draw:frame draw:name="Google Shape;186;p19" draw:style-name="gr1" draw:text-style-name="P1" draw:layer="layout" svg:width="0.396cm" svg:height="0.555cm" svg:x="1.588cm" svg:y="13.142cm">
          <draw:image xlink:href="Pictures/100002010000000F00000015AC87648E78793110.png" xlink:type="simple" xlink:show="embed" xlink:actuate="onLoad">
            <text:p/>
          </draw:image>
        </draw:frame>
        <draw:custom-shape draw:name="Google Shape;187;p19" draw:style-name="gr2" draw:text-style-name="P3" draw:layer="layout" svg:width="32.225cm" svg:height="1.884cm" svg:x="1.588cm" svg:y="1.588cm">
          <text:p text:style-name="P8"><text:span text:style-name="T10">Архитектура </text:span><text:span text:style-name="T11">Model-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p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4;p7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192;p20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193;p20" draw:style-name="gr4" draw:text-style-name="P10" draw:layer="layout" svg:width="2.645cm" svg:height="0.105cm" svg:x="15.61cm" svg:y="7.25cm">
          <text:p text:style-name="P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0" draw:style-name="gr2" draw:text-style-name="P3" draw:layer="layout" svg:width="32.225cm" svg:height="2.539cm" svg:x="0.82cm" svg:y="8.414cm">
          <text:p text:style-name="P2"><text:span text:style-name="T22">Практическая </text:span><text:span text:style-name="T23">реализ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0" draw:style-name="gr2" draw:text-style-name="P3" draw:layer="layout" svg:width="30.691cm" svg:height="1.013cm" svg:x="1.588cm" svg:y="11.483cm">
          <text:p text:style-name="P13"><text:span text:style-name="T9">От проектирования интерфейса до алгоритмов аналит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p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0;p8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200;p21" draw:style-name="gr9" draw:text-style-name="P1" draw:layer="layout" svg:width="17.348cm" svg:height="9.758cm" svg:x="16.518cm" svg:y="0cm">
          <draw:image xlink:href="Pictures/100002010000058F000003071EC1767CF8300BF6.png" xlink:type="simple" xlink:show="embed" xlink:actuate="onLoad">
            <text:p/>
          </draw:image>
        </draw:frame>
        <draw:custom-shape draw:name="Google Shape;201;p21" draw:style-name="gr2" draw:text-style-name="P3" draw:layer="layout" svg:width="14.446cm" svg:height="1.884cm" svg:x="1.244cm" svg:y="1.125cm">
          <text:p text:style-name="P8"><text:span text:style-name="T10">Интерфейс </text:span><text:span text:style-name="T11">тренаже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1" draw:style-name="gr2" draw:text-style-name="P3" draw:layer="layout" svg:width="13.757cm" svg:height="1.013cm" svg:x="1.244cm" svg:y="3.799cm">
          <text:p text:style-name="P7"><text:span text:style-name="T9">Реализовано 3 ключевых режима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1" draw:style-name="gr2" draw:text-style-name="P3" draw:layer="layout" svg:width="13.757cm" svg:height="2.027cm" svg:x="1.244cm" svg:y="8.875cm">
          <text:p text:style-name="P7"><text:span text:style-name="T9">Использование QTimer для отслеживания времени решения каждой задач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1" draw:style-name="gr7" draw:text-style-name="P3" draw:layer="layout" svg:width="13.757cm" svg:height="1.013cm" svg:x="1.244cm" svg:y="5.382cm">
          <text:p text:style-name="P7"><text:span text:style-name="T9">Обучение (теория в P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1" draw:style-name="gr7" draw:text-style-name="P3" draw:layer="layout" svg:width="13.757cm" svg:height="1.013cm" svg:x="1.244cm" svg:y="6.229cm">
          <text:p text:style-name="P7"><text:span text:style-name="T9">Тренировка (случайные задачи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1" draw:style-name="gr8" draw:text-style-name="P3" draw:layer="layout" svg:width="13.757cm" svg:height="1.013cm" svg:x="1.244cm" svg:y="7.075cm">
          <text:p text:style-name="P7"><text:span text:style-name="T9">Полный вариант (10 заданий + таймер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1" draw:style-name="gr1" draw:text-style-name="P1" draw:layer="layout" svg:width="0.66cm" svg:height="0.555cm" svg:x="1.244cm" svg:y="5.528cm">
          <draw:image xlink:href="Pictures/100002010000001900000015E296DA6174334A15.png" xlink:type="simple" xlink:show="embed" xlink:actuate="onLoad">
            <text:p/>
          </draw:image>
        </draw:frame>
        <draw:frame draw:name="Google Shape;208;p21" draw:style-name="gr1" draw:text-style-name="P1" draw:layer="layout" svg:width="0.66cm" svg:height="0.555cm" svg:x="1.244cm" svg:y="6.374cm">
          <draw:image xlink:href="Pictures/1000020100000019000000155488C46EC5AA455B.png" xlink:type="simple" xlink:show="embed" xlink:actuate="onLoad">
            <text:p/>
          </draw:image>
        </draw:frame>
        <draw:frame draw:name="Google Shape;209;p21" draw:style-name="gr1" draw:text-style-name="P1" draw:layer="layout" svg:width="0.396cm" svg:height="0.555cm" svg:x="1.244cm" svg:y="7.221cm">
          <draw:image xlink:href="Pictures/100002010000000F0000001506BDA6A71F56A779.png" xlink:type="simple" xlink:show="embed" xlink:actuate="onLoad">
            <text:p/>
          </draw:image>
        </draw:frame>
        <draw:frame draw:name="Google Shape;210;p21" draw:style-name="gr1" draw:text-style-name="P1" draw:layer="layout" svg:width="17.178cm" svg:height="9.355cm" svg:x="16.688cm" svg:y="9.759cm">
          <draw:image xlink:href="Pictures/100002010000058F000003070BB95EF7C5B9E744.png" xlink:type="simple" xlink:show="embed" xlink:actuate="onLoad">
            <text:p/>
          </draw:image>
        </draw:frame>
        <draw:frame draw:name="Google Shape;211;p21" draw:style-name="gr1" draw:text-style-name="P1" draw:layer="layout" svg:width="14.066cm" svg:height="7.66cm" svg:x="0cm" svg:y="11.389cm">
          <draw:image xlink:href="Pictures/100002010000058F00000307F6AA696C53BD7CE8.png" xlink:type="simple" xlink:show="embed" xlink:actuate="onLoad">
            <text:p/>
          </draw:image>
        </draw:frame>
        <presentation:notes draw:style-name="dp2">
          <draw:frame draw:name="Google Shape;197;p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p9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frame draw:name="Google Shape;216;p22" draw:style-name="gr1" draw:text-style-name="P1" draw:layer="layout" svg:width="19.524cm" svg:height="10.982cm" svg:x="13.85cm" svg:y="4.371cm">
          <draw:image xlink:href="Pictures/10000201000005A00000032A4307686046270D19.png" xlink:type="simple" xlink:show="embed" xlink:actuate="onLoad">
            <text:p/>
          </draw:image>
        </draw:frame>
        <draw:custom-shape draw:name="Google Shape;217;p22" draw:style-name="gr2" draw:text-style-name="P3" draw:layer="layout" svg:width="11.672cm" svg:height="5.143cm" svg:x="1.441cm" svg:y="7.65cm">
          <text:p text:style-name="P13"><text:span text:style-name="T24">Гистограмма позволяет мгновенно выявить "провальные" темы, требующие дополнительной отработ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2" draw:style-name="gr2" draw:text-style-name="P3" draw:layer="layout" svg:width="32.225cm" svg:height="1.884cm" svg:x="1.588cm" svg:y="1.588cm">
          <text:p text:style-name="P8"><text:span text:style-name="T10">Визуализация </text:span><text:span text:style-name="T11">прогрес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3;p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4;p10:notes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frame draw:name="Google Shape;223;p23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frame draw:name="Google Shape;224;p23" draw:style-name="gr1" draw:text-style-name="P1" draw:layer="layout" svg:width="30.691cm" svg:height="3.169cm" svg:x="1.588cm" svg:y="3.937cm">
          <draw:image xlink:href="Pictures/100002010000048800000079F29ECE37E70A801E.png" xlink:type="simple" xlink:show="embed" xlink:actuate="onLoad">
            <text:p/>
          </draw:image>
        </draw:frame>
        <draw:frame draw:name="Google Shape;225;p23" draw:style-name="gr1" draw:text-style-name="P1" draw:layer="layout" svg:width="30.691cm" svg:height="13.805cm" svg:x="1.588cm" svg:y="3.937cm">
          <draw:image xlink:href="Pictures/10000201000004880000020B80EE7EBAE4D84561.png" xlink:type="simple" xlink:show="embed" xlink:actuate="onLoad">
            <text:p/>
          </draw:image>
        </draw:frame>
        <draw:custom-shape draw:name="Google Shape;226;p23" draw:style-name="gr2" draw:text-style-name="P3" draw:layer="layout" svg:width="30.691cm" svg:height="1.013cm" svg:x="1.588cm" svg:y="16.367cm">
          <text:p text:style-name="P13"><text:span text:style-name="T25">Динамика "мастерства" растет при систематической работе с ошибкам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3" draw:style-name="gr1" draw:text-style-name="P1" draw:layer="layout" svg:width="28.574cm" svg:height="1.052cm" svg:x="2.646cm" svg:y="4.995cm">
          <draw:image xlink:href="Pictures/1000020100000438000000295783B85CA22C5236.png" xlink:type="simple" xlink:show="embed" xlink:actuate="onLoad">
            <text:p/>
          </draw:image>
        </draw:frame>
        <draw:custom-shape draw:name="Google Shape;228;p23" draw:style-name="gr2" draw:text-style-name="P3" draw:layer="layout" svg:width="32.225cm" svg:height="1.884cm" svg:x="1.588cm" svg:y="1.307cm">
          <text:p text:style-name="P8"><text:span text:style-name="T10">Алгоритм </text:span><text:span text:style-name="T11">готовнос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0;p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1:notes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frame draw:name="Google Shape;233;p24" draw:style-name="gr1" draw:text-style-name="P1" draw:layer="layout" svg:width="33.866cm" svg:height="19.049cm" svg:x="0cm" svg:y="0cm">
          <draw:image xlink:href="Pictures/1000020100000500000002D0902C77184B7842AF.png" xlink:type="simple" xlink:show="embed" xlink:actuate="onLoad">
            <text:p/>
          </draw:image>
        </draw:frame>
        <draw:custom-shape draw:name="Google Shape;234;p24" draw:style-name="gr2" draw:text-style-name="P3" draw:layer="layout" svg:width="32.225cm" svg:height="2.858cm" svg:x="0.82cm" svg:y="6.099cm">
          <text:p text:style-name="P2"><text:span text:style-name="T26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4" draw:style-name="gr2" draw:text-style-name="P3" draw:layer="layout" svg:width="30.691cm" svg:height="1.013cm" svg:x="1.588cm" svg:y="9.512cm">
          <text:p text:style-name="P13"><text:span text:style-name="T9">Проект "OGE Teacher App" готов к масштабированию и внедрению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4" draw:style-name="gr2" draw:text-style-name="P3" draw:layer="layout" svg:width="30.691cm" svg:height="1.525cm" svg:x="1.588cm" svg:y="11.417cm">
          <text:p text:style-name="P2"><text:span text:style-name="T27">Все задачи выполнены в полном объеме. Цель достигнута.</text:span><text:span text:style-name="T28"><text:line-break/></text:span><text:span text:style-name="T29">СПб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0;p1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12:notes" draw:style-name="gr3" draw:layer="layout" svg:width="12.7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ter" svg:font-family="Inter"/>
    <style:font-face style:name="Inter SemiBold" svg:font-family="'Inter SemiBold'"/>
    <style:font-face style:name="Urbanist" svg:font-family="Urbanist"/>
    <style:font-face style:name="Urbanist Medium" svg:font-family="'Urbanis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</office:meta>
</office:document-meta>
</file>